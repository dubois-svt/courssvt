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1000002BE54C2801B.png" manifest:media-type="image/png"/>
  <manifest:file-entry manifest:full-path="Pictures/10000001000002F900000341AC376141.png" manifest:media-type="image/png"/>
  <manifest:file-entry manifest:full-path="Pictures/100000010000022F0000012DE783619C.png" manifest:media-type="image/png"/>
  <manifest:file-entry manifest:full-path="Pictures/10000001000001DA0000016333DADDBC.png" manifest:media-type="image/png"/>
  <manifest:file-entry manifest:full-path="Pictures/100000010000019F000000CC26B70710.png" manifest:media-type="image/png"/>
  <manifest:file-entry manifest:full-path="Pictures/10000000000002D20000023089E195D1.png" manifest:media-type="image/png"/>
  <manifest:file-entry manifest:full-path="Pictures/10000001000003CD0000020231C24CD9.png" manifest:media-type="image/png"/>
  <manifest:file-entry manifest:full-path="Pictures/10000001000001DA0000016317D89016.png" manifest:media-type="image/png"/>
  <manifest:file-entry manifest:full-path="Pictures/10000001000001DA000001DAAE4DCF0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3.343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54cm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253cm" fo:min-width="3.47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8cm" fo:min-width="2.754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85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6cm, 1.032cm, 3.902cm, 6.428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441cm, 0cm, 0cm)" draw:image-opacity="100%" style:mirror="none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57cm, 0cm, 1.611cm, 6.049cm)" draw:image-opacity="100%" style:mirror="none" loext:decorative="false"/>
    </style:style>
    <style:style style:name="gr14" style:family="graphic" style:parent-style-name="standard">
      <style:graphic-properties draw:fill-color="#e16173" draw:textarea-horizontal-align="justify" draw:textarea-vertical-align="bottom" draw:auto-grow-height="false" fo:min-height="6.497cm" fo:min-width="20.707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d4ea6b" draw:textarea-horizontal-align="justify" draw:textarea-vertical-align="bottom" draw:auto-grow-height="false" fo:min-height="6.497cm" fo:min-width="29.046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253cm" fo:min-width="3.47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253cm" fo:min-width="3.47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253cm" fo:min-width="3.47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21" style:family="graphic" style:parent-style-name="standard">
      <style:graphic-properties draw:marker-start="Extrémités_20_de_20_flèche_20_3" draw:marker-end="" draw:textarea-horizontal-align="center" draw:textarea-vertical-align="middle" loext:decorative="false"/>
    </style:style>
    <style:style style:name="gr22" style:family="graphic" style:parent-style-name="objectwithoutfill">
      <style:graphic-properties draw:marker-end="Extrémités_20_de_20_flèche_20_4" draw:marker-end-width="0.3cm" draw:fill="none" draw:textarea-vertical-align="middle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253cm" fo:min-width="3.47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253cm" fo:min-width="3.47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253cm" fo:min-width="3.47cm" style:writing-mode="lr-tb" loext:decorative="false"/>
      <style:paragraph-properties style:writing-mode="lr-tb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2.253cm" fo:min-width="4.436cm" style:writing-mode="lr-tb" loext:decorative="false"/>
      <style:paragraph-properties style:writing-mode="lr-tb"/>
    </style:style>
    <style:style style:name="gr28" style:family="graphic" style:parent-style-name="standard">
      <style:graphic-properties draw:fill-color="#e16173" draw:textarea-horizontal-align="justify" draw:textarea-vertical-align="bottom" draw:auto-grow-height="false" fo:min-height="4.318cm" fo:min-width="13.858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d4ea6b" draw:textarea-horizontal-align="justify" draw:textarea-vertical-align="bottom" draw:auto-grow-height="false" fo:min-height="4.318cm" fo:min-width="19.504cm" style:writing-mode="lr-tb" loext:decorative="false"/>
      <style:paragraph-properties style:writing-mode="lr-tb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1.444cm" fo:min-width="2.188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444cm" fo:min-width="2.188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445cm" fo:min-width="2.188cm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445cm" fo:min-width="2.188cm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02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039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92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875cm" loext:decorative="false"/>
      <style:paragraph-properties style:writing-mode="lr-tb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1.445cm" fo:min-width="2.188cm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draw:fill="none" fo:min-height="0.433cm" loext:decorative="false"/>
      <style:paragraph-properties style:writing-mode="lr-tb"/>
    </style:style>
    <style:style style:name="gr40" style:family="graphic" style:parent-style-name="standard">
      <style:graphic-properties draw:stroke="none" draw:fill="none" fo:min-height="0.883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344cm" loext:decorative="false"/>
      <style:paragraph-properties style:writing-mode="lr-tb"/>
    </style:style>
    <style:style style:name="gr42" style:family="graphic" style:parent-style-name="objectwithoutfill">
      <style:graphic-properties draw:fill="none" draw:textarea-vertical-align="middle" loext:decorative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8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9cm" fo:min-width="0cm" loext:decorative="false"/>
      <style:paragraph-properties style:writing-mode="lr-tb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635cm, 6.27cm, 6.95cm)" draw:image-opacity="100%" style:mirror="none" loext:decorative="false"/>
    </style:style>
    <style:style style:name="gr4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2.644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177cm" fo:min-width="2.411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1.568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1.543cm" loext:decorative="false"/>
      <style:paragraph-properties style:writing-mode="lr-tb"/>
    </style:style>
    <style:style style:name="gr51" style:family="graphic" style:parent-style-name="objectwithoutfill">
      <style:graphic-properties svg:stroke-width="0.159cm" svg:stroke-color="#000000" draw:marker-start-width="0.437cm" draw:marker-end-width="0.437cm" draw:stroke-linejoin="round" svg:stroke-linecap="round" draw:fill="none" draw:textarea-vertical-align="middle" fo:padding-top="0.203cm" fo:padding-bottom="0.203cm" fo:padding-left="0.328cm" fo:padding-right="0.328cm" loext:decorative="fals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294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589cm" fo:min-width="0cm" loext:decorative="false"/>
      <style:paragraph-properties style:writing-mode="lr-tb"/>
    </style:style>
    <style:style style:name="gr5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text-align="start"/>
      <style:text-properties fo:font-weight="bold" style:font-weight-asian="bold" style:font-weight-complex="bold"/>
    </style:style>
    <style:style style:name="P7" style:family="paragraph">
      <loext:graphic-properties draw:fill-color="#e16173"/>
      <style:paragraph-properties fo:text-align="start" style:writing-mode="lr-tb"/>
      <style:text-properties fo:font-weight="bold" style:font-weight-asian="bold" style:font-weight-complex="bold"/>
    </style:style>
    <style:style style:name="P8" style:family="paragraph">
      <loext:graphic-properties draw:fill-color="#d4ea6b"/>
      <style:paragraph-properties fo:text-align="start" style:writing-mode="lr-tb"/>
      <style:text-properties fo:font-weight="bold" style:font-weight-asian="bold" style:font-weight-complex="bold"/>
    </style:style>
    <style:style style:name="P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/>
    </style:style>
    <style:style style:name="P11" style:family="paragraph"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12" style:family="paragraph">
      <loext:graphic-properties draw:fill-color="#e16173"/>
      <style:paragraph-properties fo:text-align="start" style:writing-mode="lr-tb"/>
      <style:text-properties fo:font-size="11pt" fo:font-weight="bold" style:font-size-asian="11pt" style:font-weight-asian="bold" style:font-size-complex="11pt" style:font-weight-complex="bold"/>
    </style:style>
    <style:style style:name="P13" style:family="paragraph">
      <loext:graphic-properties draw:fill-color="#d4ea6b"/>
      <style:paragraph-properties fo:text-align="start" style:writing-mode="lr-tb"/>
      <style:text-properties fo:font-size="11pt" fo:font-weight="bold" style:font-size-asian="11pt" style:font-weight-asian="bold" style:font-size-complex="11pt" style:font-weight-complex="bold"/>
    </style:style>
    <style:style style:name="P14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15" style:family="paragraph">
      <loext:graphic-properties draw:fill-color="#ffffff"/>
      <style:paragraph-properties fo:text-align="center" style:writing-mode="lr-tb"/>
      <style:text-properties fo:font-size="11pt" style:font-size-asian="11pt" style:font-size-complex="11pt"/>
    </style:style>
    <style:style style:name="P1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1pt" style:font-size-asian="11pt" style:font-size-complex="11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1pt" style:font-size-asian="11pt" style:font-size-complex="11pt"/>
    </style:style>
    <style:style style:name="P18" style:family="paragraph">
      <loext:graphic-properties draw:fill="none" draw:fill-color="#ffffff"/>
      <style:text-properties fo:font-size="11pt" style:font-size-asian="11pt" style:font-size-complex="11pt"/>
    </style:style>
    <style:style style:name="P19" style:family="paragraph">
      <loext:graphic-properties draw:fill="none"/>
      <style:text-properties fo:font-size="11pt" style:font-size-asian="11pt" style:font-size-complex="11pt"/>
    </style:style>
    <style:style style:name="P20" style:family="paragraph">
      <style:paragraph-properties fo:text-align="center"/>
      <style:text-properties fo:font-size="11pt" style:font-size-asian="11pt" style:font-size-complex="11pt"/>
    </style:style>
    <style:style style:name="P21" style:family="paragraph">
      <loext:graphic-properties draw:fill="none"/>
      <style:text-properties fo:font-size="18pt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none" draw:fill-color="#ffffff"/>
      <style:text-properties fo:font-size="15pt" style:font-size-asian="15pt" style:font-size-complex="15pt"/>
    </style:style>
    <style:style style:name="P24" style:family="paragraph">
      <loext:graphic-properties draw:fill="solid" draw:fill-color="#ffffff"/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435cm" svg:height="2.896cm" svg:x="7.33cm" svg:y="2.682cm">
          <text:p text:style-name="P1">éolien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764cm" svg:y1="4.147cm" svg:x2="15.339cm" svg:y2="4.147cm">
          <text:p/>
        </draw:line>
        <draw:line draw:style-name="gr2" draw:text-style-name="P3" draw:layer="layout" svg:x1="4.765cm" svg:y1="4.148cm" svg:x2="7.34cm" svg:y2="4.148cm">
          <text:p/>
        </draw:line>
        <draw:custom-shape draw:style-name="gr1" draw:text-style-name="P2" draw:layer="layout" svg:width="5.435cm" svg:height="2.896cm" svg:x="7.33cm" svg:y="14.683cm">
          <text:p text:style-name="P1">Lam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764cm" svg:y1="16.148cm" svg:x2="15.339cm" svg:y2="16.148cm">
          <text:p/>
        </draw:line>
        <draw:line draw:style-name="gr2" draw:text-style-name="P3" draw:layer="layout" svg:x1="4.765cm" svg:y1="16.149cm" svg:x2="7.34cm" svg:y2="16.149cm">
          <text:p/>
        </draw:line>
        <draw:frame draw:style-name="gr3" draw:text-style-name="P4" draw:layer="layout" svg:width="3.254cm" svg:height="1.673cm" svg:x="15.454cm" svg:y="3.254cm">
          <draw:text-box>
            <text:p>Énergie</text:p>
            <text:p>électrique</text:p>
          </draw:text-box>
        </draw:frame>
        <draw:custom-shape draw:style-name="gr1" draw:text-style-name="P2" draw:layer="layout" svg:width="5.435cm" svg:height="2.896cm" svg:x="7.33cm" svg:y="8.184cm">
          <text:p text:style-name="P1">Radiateur</text:p>
          <text:p text:style-name="P1">électriq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764cm" svg:y1="9.649cm" svg:x2="15.339cm" svg:y2="9.649cm">
          <text:p/>
        </draw:line>
        <draw:line draw:style-name="gr2" draw:text-style-name="P3" draw:layer="layout" svg:x1="4.765cm" svg:y1="9.65cm" svg:x2="7.34cm" svg:y2="9.65cm">
          <text:p/>
        </draw:line>
        <draw:frame draw:style-name="gr3" draw:text-style-name="P4" draw:layer="layout" svg:width="3.254cm" svg:height="1.673cm" svg:x="2.011cm" svg:y="8.796cm">
          <draw:text-box>
            <text:p>Énergie</text:p>
            <text:p>électrique</text:p>
          </draw:text-box>
        </draw:frame>
        <draw:custom-shape draw:style-name="gr4" draw:text-style-name="P2" draw:layer="layout" svg:width="3.97cm" svg:height="2.503cm" svg:x="1cm" svg:y="21.596cm">
          <text:p text:style-name="P1">alimente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965cm" svg:y1="22.949cm" svg:x2="7.54cm" svg:y2="22.949cm">
          <text:p/>
        </draw:line>
        <draw:custom-shape draw:style-name="gr4" draw:text-style-name="P2" draw:layer="layout" svg:width="3.97cm" svg:height="2.503cm" svg:x="7.436cm" svg:y="21.631cm">
          <text:p text:style-name="P1">alimente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466cm" svg:y1="22.949cm" svg:x2="14.041cm" svg:y2="22.949cm">
          <text:p/>
        </draw:line>
        <draw:custom-shape draw:style-name="gr4" draw:text-style-name="P2" draw:layer="layout" svg:width="3.97cm" svg:height="2.503cm" svg:x="13.937cm" svg:y="21.631cm">
          <text:p text:style-name="P1">alimenter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2" draw:layer="layout" svg:width="5.435cm" svg:height="2.896cm" svg:x="7.33cm" svg:y="2.682cm">
          <text:p text:style-name="P1">congélat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764cm" svg:y1="4.147cm" svg:x2="15.339cm" svg:y2="4.147cm">
          <text:p/>
        </draw:line>
        <draw:line draw:style-name="gr2" draw:text-style-name="P3" draw:layer="layout" svg:x1="4.765cm" svg:y1="4.148cm" svg:x2="7.34cm" svg:y2="4.148cm">
          <text:p/>
        </draw:line>
        <draw:custom-shape draw:style-name="gr1" draw:text-style-name="P2" draw:layer="layout" svg:width="5.435cm" svg:height="2.896cm" svg:x="7.33cm" svg:y="14.683cm">
          <text:p text:style-name="P1">Grille-p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764cm" svg:y1="16.148cm" svg:x2="15.339cm" svg:y2="16.148cm">
          <text:p/>
        </draw:line>
        <draw:line draw:style-name="gr2" draw:text-style-name="P3" draw:layer="layout" svg:x1="4.765cm" svg:y1="16.149cm" svg:x2="7.34cm" svg:y2="16.149cm">
          <text:p/>
        </draw:line>
        <draw:frame draw:style-name="gr5" draw:text-style-name="P4" draw:layer="layout" svg:width="3.254cm" svg:height="1.768cm" svg:x="1.396cm" svg:y="3.237cm">
          <draw:text-box>
            <text:p>Énergie</text:p>
            <text:p>électrique</text:p>
          </draw:text-box>
        </draw:frame>
        <draw:custom-shape draw:style-name="gr1" draw:text-style-name="P2" draw:layer="layout" svg:width="5.435cm" svg:height="2.896cm" svg:x="7.33cm" svg:y="8.184cm">
          <text:p text:style-name="P1">Ventilat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764cm" svg:y1="9.649cm" svg:x2="15.339cm" svg:y2="9.649cm">
          <text:p/>
        </draw:line>
        <draw:line draw:style-name="gr2" draw:text-style-name="P3" draw:layer="layout" svg:x1="4.765cm" svg:y1="9.65cm" svg:x2="7.34cm" svg:y2="9.65cm">
          <text:p/>
        </draw:line>
        <draw:frame draw:style-name="gr3" draw:text-style-name="P4" draw:layer="layout" svg:width="3.254cm" svg:height="1.673cm" svg:x="2.011cm" svg:y="8.796cm">
          <draw:text-box>
            <text:p>Énergie</text:p>
            <text:p>électrique</text:p>
          </draw:text-box>
        </draw:frame>
        <draw:custom-shape draw:style-name="gr4" draw:text-style-name="P2" draw:layer="layout" svg:width="3.97cm" svg:height="2.503cm" svg:x="1cm" svg:y="21.596cm">
          <text:p text:style-name="P1">alimente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965cm" svg:y1="22.949cm" svg:x2="7.54cm" svg:y2="22.949cm">
          <text:p/>
        </draw:line>
        <draw:custom-shape draw:style-name="gr4" draw:text-style-name="P2" draw:layer="layout" svg:width="3.97cm" svg:height="2.503cm" svg:x="7.436cm" svg:y="21.631cm">
          <text:p text:style-name="P1">alimente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466cm" svg:y1="22.949cm" svg:x2="14.041cm" svg:y2="22.949cm">
          <text:p/>
        </draw:line>
        <draw:custom-shape draw:style-name="gr4" draw:text-style-name="P2" draw:layer="layout" svg:width="3.97cm" svg:height="2.503cm" svg:x="13.937cm" svg:y="21.631cm">
          <text:p text:style-name="P1">alimenter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254cm" svg:height="1.673cm" svg:x="1.814cm" svg:y="15.391cm">
          <draw:text-box>
            <text:p>Énergie</text:p>
            <text:p>électrique</text:p>
          </draw:text-box>
        </draw:frame>
        <draw:frame draw:style-name="gr3" draw:text-style-name="P4" draw:layer="layout" svg:width="3.326cm" svg:height="1.673cm" svg:x="15.398cm" svg:y="15.432cm">
          <draw:text-box>
            <text:p>Énergie</text:p>
            <text:p>thermique</text:p>
          </draw:text-box>
        </draw:frame>
        <draw:frame draw:style-name="gr3" draw:text-style-name="P4" draw:layer="layout" svg:width="3.326cm" svg:height="1.673cm" svg:x="15.319cm" svg:y="3.349cm">
          <draw:text-box>
            <text:p>Énergie</text:p>
            <text:p>thermique</text:p>
          </draw:text-box>
        </draw:frame>
        <draw:frame draw:style-name="gr3" draw:text-style-name="P4" draw:layer="layout" svg:width="3.254cm" svg:height="1.673cm" svg:x="15.477cm" svg:y="8.84cm">
          <draw:text-box>
            <text:p>Énergie</text:p>
            <text:p>cinétique</text:p>
          </draw:text-box>
        </draw:frame>
      </draw:page>
      <draw:page draw:name="page3" draw:style-name="dp1" draw:master-page-name="Standard">
        <draw:line draw:style-name="gr2" draw:text-style-name="P3" draw:layer="layout" svg:x1="0cm" svg:y1="13.858cm" svg:x2="2.575cm" svg:y2="13.858cm">
          <text:p/>
        </draw:line>
        <draw:custom-shape draw:style-name="gr4" draw:text-style-name="P2" draw:layer="layout" svg:width="3.97cm" svg:height="2.503cm" svg:x="2.497cm" svg:y="12.434cm">
          <text:p text:style-name="P1">batteri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527cm" svg:y1="13.752cm" svg:x2="9.102cm" svg:y2="13.752cm">
          <text:p/>
        </draw:line>
        <draw:custom-shape draw:style-name="gr4" draw:text-style-name="P2" draw:layer="layout" svg:width="3.97cm" svg:height="2.503cm" svg:x="8.998cm" svg:y="12.434cm">
          <text:p text:style-name="P5">câbl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97cm" svg:height="2.503cm" svg:x="15.525cm" svg:y="12.391cm">
          <text:p text:style-name="P5">moteu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99cm" svg:y1="13.744cm" svg:x2="15.565cm" svg:y2="13.744cm">
          <text:p/>
        </draw:line>
        <draw:custom-shape draw:style-name="gr4" draw:text-style-name="P2" draw:layer="layout" svg:width="3.97cm" svg:height="2.503cm" svg:x="21.961cm" svg:y="12.426cm">
          <text:p text:style-name="P5">roue/engrenag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9.491cm" svg:y1="13.744cm" svg:x2="22.066cm" svg:y2="13.744cm">
          <text:p/>
        </draw:line>
        <draw:line draw:style-name="gr2" draw:text-style-name="P3" draw:layer="layout" svg:x1="25.992cm" svg:y1="13.745cm" svg:x2="28.567cm" svg:y2="13.745cm">
          <text:p/>
        </draw:line>
        <draw:frame draw:style-name="gr6" draw:text-style-name="P4" draw:layer="layout" svg:width="3.11cm" svg:height="0.962cm" svg:x="3.235cm" svg:y="15.266cm">
          <draw:text-box>
            <text:p text:style-name="P5">alimenter</text:p>
          </draw:text-box>
        </draw:frame>
        <draw:frame draw:style-name="gr7" draw:text-style-name="P4" draw:layer="layout" svg:width="3.749cm" svg:height="0.962cm" svg:x="9.345cm" svg:y="15.16cm">
          <draw:text-box>
            <text:p>distribuer</text:p>
          </draw:text-box>
        </draw:frame>
        <draw:frame draw:style-name="gr8" draw:text-style-name="P4" draw:layer="layout" svg:width="2.936cm" svg:height="0.962cm" svg:x="16.66cm" svg:y="15.212cm">
          <draw:text-box>
            <text:p>convertir</text:p>
          </draw:text-box>
        </draw:frame>
        <draw:frame draw:style-name="gr9" draw:text-style-name="P4" draw:layer="layout" svg:width="4.985cm" svg:height="0.962cm" svg:x="22.061cm" svg:y="15.212cm">
          <draw:text-box>
            <text:p>transmettre</text:p>
          </draw:text-box>
        </draw:frame>
        <draw:frame draw:style-name="gr10" draw:text-style-name="P3" draw:layer="layout" svg:width="4.683cm" svg:height="4.683cm" svg:x="2.142cm" svg:y="7.249cm">
          <draw:image xlink:href="Pictures/10000001000001DA000001DAAE4DCF04.png" xlink:type="simple" xlink:show="embed" xlink:actuate="onLoad" draw:mime-type="image/png">
            <text:p/>
          </draw:image>
        </draw:frame>
        <draw:frame draw:style-name="gr11" draw:text-style-name="P3" draw:layer="layout" svg:width="5.079cm" svg:height="4.073cm" svg:x="15.185cm" svg:y="7.593cm">
          <draw:image xlink:href="Pictures/10000001000001DA0000016317D89016.png" xlink:type="simple" xlink:show="embed" xlink:actuate="onLoad" draw:mime-type="image/png">
            <text:p/>
          </draw:image>
        </draw:frame>
        <draw:frame draw:style-name="gr10" draw:text-style-name="P3" draw:layer="layout" svg:width="5.491cm" svg:height="2.699cm" svg:x="22.01cm" svg:y="4.894cm">
          <draw:image xlink:href="Pictures/100000010000019F000000CC26B70710.png" xlink:type="simple" xlink:show="embed" xlink:actuate="onLoad" draw:mime-type="image/png">
            <text:p/>
          </draw:image>
        </draw:frame>
        <draw:frame draw:style-name="gr12" draw:text-style-name="P3" draw:layer="layout" svg:width="4.921cm" svg:height="4.695cm" svg:x="22.011cm" svg:y="7.738cm">
          <draw:image xlink:href="Pictures/100000010000022F0000012DE783619C.png" xlink:type="simple" xlink:show="embed" xlink:actuate="onLoad" draw:mime-type="image/png">
            <text:p/>
          </draw:image>
        </draw:frame>
        <draw:frame draw:style-name="gr13" draw:text-style-name="P3" draw:layer="layout" svg:width="6.49cm" svg:height="3.923cm" svg:x="8.007cm" svg:y="7.849cm">
          <draw:image xlink:href="Pictures/10000001000001DA0000016333DADDBC.png" xlink:type="simple" xlink:show="embed" xlink:actuate="onLoad" draw:mime-type="image/png">
            <text:p/>
          </draw:image>
        </draw:frame>
      </draw:page>
      <draw:page draw:name="page4" draw:style-name="dp1" draw:master-page-name="Standard">
        <draw:custom-shape draw:style-name="gr14" draw:text-style-name="P7" draw:layer="layout" svg:width="21.207cm" svg:height="6.747cm" svg:x="2.524cm" svg:y="3.705cm">
          <text:p text:style-name="P6"><text:span text:style-name="T1">Chaine d’___________________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29.546cm" svg:height="6.747cm" svg:x="1.896cm" svg:y="11.774cm">
          <text:p text:style-name="P6"><text:span text:style-name="T1">Chaine d’_______________________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268cm" svg:y1="13.726cm" svg:x2="4.843cm" svg:y2="13.726cm">
          <text:p/>
        </draw:line>
        <draw:custom-shape draw:style-name="gr4" draw:text-style-name="P2" draw:layer="layout" svg:width="3.97cm" svg:height="2.503cm" svg:x="4.765cm" svg:y="12.302cm">
          <text:p text:style-name="P1">batteri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795cm" svg:y1="13.62cm" svg:x2="11.37cm" svg:y2="13.62cm">
          <text:p/>
        </draw:line>
        <draw:custom-shape draw:style-name="gr16" draw:text-style-name="P9" xml:id="id1" draw:id="id1" draw:layer="layout" svg:width="3.97cm" svg:height="2.503cm" svg:x="11.266cm" svg:y="12.302cm">
          <text:p text:style-name="P5">câble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97cm" svg:height="2.503cm" svg:x="17.793cm" svg:y="12.259cm">
          <text:p text:style-name="P5">moteu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258cm" svg:y1="13.612cm" svg:x2="17.833cm" svg:y2="13.612cm">
          <text:p/>
        </draw:line>
        <draw:custom-shape draw:style-name="gr18" draw:text-style-name="P9" draw:layer="layout" svg:width="3.97cm" svg:height="2.503cm" svg:x="24.229cm" svg:y="12.294cm">
          <text:p text:style-name="P5">roue/engrenag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1.759cm" svg:y1="13.612cm" svg:x2="24.334cm" svg:y2="13.612cm">
          <text:p/>
        </draw:line>
        <draw:line draw:style-name="gr2" draw:text-style-name="P3" draw:layer="layout" svg:x1="28.26cm" svg:y1="13.613cm" svg:x2="30.835cm" svg:y2="13.613cm">
          <text:p/>
        </draw:line>
        <draw:frame draw:style-name="gr6" draw:text-style-name="P4" draw:layer="layout" svg:width="3.11cm" svg:height="0.962cm" svg:x="5.195cm" svg:y="14.825cm">
          <draw:text-box>
            <text:p text:style-name="P5">alimenter</text:p>
          </draw:text-box>
        </draw:frame>
        <draw:frame draw:style-name="gr7" draw:text-style-name="P4" draw:layer="layout" svg:width="3.749cm" svg:height="0.962cm" svg:x="12.011cm" svg:y="14.94cm">
          <draw:text-box>
            <text:p>distribuer</text:p>
          </draw:text-box>
        </draw:frame>
        <draw:frame draw:style-name="gr8" draw:text-style-name="P4" draw:layer="layout" svg:width="2.936cm" svg:height="0.962cm" svg:x="18.399cm" svg:y="15.079cm">
          <draw:text-box>
            <text:p>convertir</text:p>
          </draw:text-box>
        </draw:frame>
        <draw:frame draw:style-name="gr9" draw:text-style-name="P4" draw:layer="layout" svg:width="4.985cm" svg:height="0.962cm" svg:x="24.373cm" svg:y="14.77cm">
          <draw:text-box>
            <text:p>transmettre</text:p>
          </draw:text-box>
        </draw:frame>
        <draw:custom-shape draw:style-name="gr4" draw:text-style-name="P2" draw:layer="layout" svg:width="3.97cm" svg:height="2.503cm" svg:x="5.397cm" svg:y="5.0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97cm" svg:height="2.503cm" svg:x="11.924cm" svg:y="4.982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389cm" svg:y1="6.335cm" svg:x2="11.964cm" svg:y2="6.335cm">
          <text:p/>
        </draw:line>
        <draw:custom-shape draw:style-name="gr4" draw:text-style-name="P2" xml:id="id2" draw:id="id2" draw:layer="layout" svg:width="3.97cm" svg:height="2.503cm" svg:x="18.36cm" svg:y="5.017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89cm" svg:y1="6.335cm" svg:x2="18.465cm" svg:y2="6.335cm">
          <text:p/>
        </draw:line>
        <draw:line draw:style-name="gr2" draw:text-style-name="P3" draw:layer="layout" svg:x1="2.791cm" svg:y1="6.336cm" svg:x2="5.366cm" svg:y2="6.336cm">
          <text:p/>
        </draw:line>
        <draw:frame draw:style-name="gr19" draw:text-style-name="P10" draw:layer="layout" svg:width="3.11cm" svg:height="0.963cm" svg:x="5.986cm" svg:y="7.721cm">
          <draw:text-box>
            <text:p>acquérir</text:p>
          </draw:text-box>
        </draw:frame>
        <draw:frame draw:style-name="gr19" draw:text-style-name="P10" draw:layer="layout" svg:width="2.936cm" svg:height="0.963cm" svg:x="12.511cm" svg:y="7.633cm">
          <draw:text-box>
            <text:p>traiter</text:p>
          </draw:text-box>
        </draw:frame>
        <draw:frame draw:style-name="gr20" draw:text-style-name="P10" draw:layer="layout" svg:width="4.942cm" svg:height="1.673cm" svg:x="18.518cm" svg:y="7.633cm">
          <draw:text-box>
            <text:p>communiquer</text:p>
          </draw:text-box>
        </draw:frame>
        <draw:connector draw:style-name="gr21" draw:text-style-name="P1" draw:layer="layout" svg:x1="13.251cm" svg:y1="12.302cm" svg:x2="22.33cm" svg:y2="6.268cm" draw:start-shape="id1" draw:start-glue-point="0" draw:end-shape="id2" draw:end-glue-point="1" svg:d="M13251 12302v-2392h9580v-3642h-501" svg:viewBox="0 0 9581 6035">
          <text:p/>
        </draw:connector>
        <draw:line draw:style-name="gr22" draw:text-style-name="P3" draw:layer="layout" svg:x1="22.307cm" svg:y1="5.699cm" svg:x2="25.563cm" svg:y2="5.699cm">
          <text:p/>
        </draw:line>
        <draw:frame draw:style-name="gr23" draw:text-style-name="P4" draw:layer="layout" svg:width="2.686cm" svg:height="0.962cm" svg:x="25.767cm" svg:y="5.373cm">
          <draw:text-box>
            <text:p>Humain</text:p>
          </draw:text-box>
        </draw:frame>
      </draw:page>
      <draw:page draw:name="page5" draw:style-name="dp1" draw:master-page-name="Standard">
        <draw:custom-shape draw:style-name="gr14" draw:text-style-name="P7" draw:layer="layout" svg:width="21.207cm" svg:height="6.747cm" svg:x="2.524cm" svg:y="3.705cm">
          <text:p text:style-name="P6"><text:span text:style-name="T1">Chaine d’informa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29.546cm" svg:height="6.747cm" svg:x="1.896cm" svg:y="11.774cm">
          <text:p text:style-name="P6"><text:span text:style-name="T1">Chaine d’énergi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268cm" svg:y1="13.726cm" svg:x2="4.843cm" svg:y2="13.726cm">
          <text:p/>
        </draw:line>
        <draw:custom-shape draw:style-name="gr4" draw:text-style-name="P2" draw:layer="layout" svg:width="3.97cm" svg:height="2.503cm" svg:x="4.765cm" svg:y="12.302cm">
          <text:p text:style-name="P1">batteri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795cm" svg:y1="13.62cm" svg:x2="11.37cm" svg:y2="13.62cm">
          <text:p/>
        </draw:line>
        <draw:custom-shape draw:style-name="gr24" draw:text-style-name="P9" xml:id="id3" draw:id="id3" draw:layer="layout" svg:width="3.97cm" svg:height="2.503cm" svg:x="11.266cm" svg:y="12.302cm">
          <text:p text:style-name="P5">câble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3.97cm" svg:height="2.503cm" svg:x="17.793cm" svg:y="12.259cm">
          <text:p text:style-name="P5">moteu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258cm" svg:y1="13.612cm" svg:x2="17.833cm" svg:y2="13.612cm">
          <text:p/>
        </draw:line>
        <draw:custom-shape draw:style-name="gr26" draw:text-style-name="P9" draw:layer="layout" svg:width="3.97cm" svg:height="2.503cm" svg:x="24.229cm" svg:y="12.294cm">
          <text:p text:style-name="P5">roue/engrenag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1.759cm" svg:y1="13.612cm" svg:x2="24.334cm" svg:y2="13.612cm">
          <text:p/>
        </draw:line>
        <draw:line draw:style-name="gr2" draw:text-style-name="P3" draw:layer="layout" svg:x1="28.26cm" svg:y1="13.613cm" svg:x2="30.835cm" svg:y2="13.613cm">
          <text:p/>
        </draw:line>
        <draw:frame draw:style-name="gr6" draw:text-style-name="P4" draw:layer="layout" svg:width="3.11cm" svg:height="0.962cm" svg:x="5.195cm" svg:y="14.825cm">
          <draw:text-box>
            <text:p text:style-name="P5">alimenter</text:p>
          </draw:text-box>
        </draw:frame>
        <draw:frame draw:style-name="gr7" draw:text-style-name="P4" draw:layer="layout" svg:width="3.749cm" svg:height="0.962cm" svg:x="12.011cm" svg:y="14.94cm">
          <draw:text-box>
            <text:p>distribuer</text:p>
          </draw:text-box>
        </draw:frame>
        <draw:frame draw:style-name="gr8" draw:text-style-name="P4" draw:layer="layout" svg:width="2.936cm" svg:height="0.962cm" svg:x="18.399cm" svg:y="15.079cm">
          <draw:text-box>
            <text:p>convertir</text:p>
          </draw:text-box>
        </draw:frame>
        <draw:frame draw:style-name="gr9" draw:text-style-name="P4" draw:layer="layout" svg:width="4.985cm" svg:height="0.962cm" svg:x="24.373cm" svg:y="14.77cm">
          <draw:text-box>
            <text:p>transmettre</text:p>
          </draw:text-box>
        </draw:frame>
        <draw:custom-shape draw:style-name="gr4" draw:text-style-name="P2" draw:layer="layout" svg:width="3.97cm" svg:height="2.503cm" svg:x="5.397cm" svg:y="5.025cm">
          <text:p text:style-name="P1">Capteur</text:p>
          <text:p text:style-name="P1">ultrason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4.936cm" svg:height="2.503cm" svg:x="11.531cm" svg:y="4.982cm">
          <text:p text:style-name="P1">Interface programmabl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389cm" svg:y1="6.335cm" svg:x2="11.491cm" svg:y2="6.358cm">
          <text:p/>
        </draw:line>
        <draw:custom-shape draw:style-name="gr4" draw:text-style-name="P2" xml:id="id4" draw:id="id4" draw:layer="layout" svg:width="3.97cm" svg:height="2.503cm" svg:x="18.36cm" svg:y="5.017cm">
          <text:p text:style-name="P1">Écran Led</text:p>
          <text:p text:style-name="P1">Câbl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6.388cm" svg:y1="6.398cm" svg:x2="18.465cm" svg:y2="6.335cm">
          <text:p/>
        </draw:line>
        <draw:line draw:style-name="gr2" draw:text-style-name="P3" draw:layer="layout" svg:x1="2.791cm" svg:y1="6.336cm" svg:x2="5.366cm" svg:y2="6.336cm">
          <text:p/>
        </draw:line>
        <draw:frame draw:style-name="gr19" draw:text-style-name="P10" draw:layer="layout" svg:width="3.11cm" svg:height="0.963cm" svg:x="5.986cm" svg:y="7.721cm">
          <draw:text-box>
            <text:p>acquérir</text:p>
          </draw:text-box>
        </draw:frame>
        <draw:frame draw:style-name="gr19" draw:text-style-name="P10" draw:layer="layout" svg:width="2.936cm" svg:height="0.963cm" svg:x="12.511cm" svg:y="7.633cm">
          <draw:text-box>
            <text:p>traiter</text:p>
          </draw:text-box>
        </draw:frame>
        <draw:frame draw:style-name="gr20" draw:text-style-name="P10" draw:layer="layout" svg:width="4.942cm" svg:height="1.673cm" svg:x="18.518cm" svg:y="7.633cm">
          <draw:text-box>
            <text:p>communiquer</text:p>
          </draw:text-box>
        </draw:frame>
        <draw:connector draw:style-name="gr21" draw:text-style-name="P1" draw:layer="layout" svg:x1="13.251cm" svg:y1="12.302cm" svg:x2="22.33cm" svg:y2="6.268cm" draw:start-shape="id3" draw:start-glue-point="0" draw:end-shape="id4" draw:end-glue-point="1" svg:d="M13251 12302v-2392h9580v-3642h-501" svg:viewBox="0 0 9581 6035">
          <text:p/>
        </draw:connector>
        <draw:line draw:style-name="gr22" draw:text-style-name="P3" draw:layer="layout" svg:x1="22.307cm" svg:y1="5.699cm" svg:x2="25.563cm" svg:y2="5.699cm">
          <text:p/>
        </draw:line>
        <draw:frame draw:style-name="gr23" draw:text-style-name="P4" draw:layer="layout" svg:width="2.686cm" svg:height="0.962cm" svg:x="25.767cm" svg:y="5.373cm">
          <draw:text-box>
            <text:p>Humain</text:p>
          </draw:text-box>
        </draw:frame>
      </draw:page>
      <draw:page draw:name="page6" draw:style-name="dp1" draw:master-page-name="Standard">
        <draw:custom-shape draw:style-name="gr28" draw:text-style-name="P12" draw:layer="layout" svg:width="14.358cm" svg:height="4.568cm" svg:x="2.321cm" svg:y="3.705cm">
          <text:p text:style-name="P11"><text:span text:style-name="T2">Chaine d’___________________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20.004cm" svg:height="4.568cm" svg:x="1.896cm" svg:y="9.168cm">
          <text:p text:style-name="P11"><text:span text:style-name="T2">Chaine d’_______________________</text:span></text:p>
          <draw:enhanced-geometry svg:viewBox="0 0 21600 21600" draw:type="rectangle" draw:enhanced-path="M 0 0 L 21600 0 21600 21600 0 21600 0 0 Z N"/>
        </draw:custom-shape>
        <draw:line draw:style-name="gr2" draw:text-style-name="P14" draw:layer="layout" svg:x1="2.148cm" svg:y1="10.49cm" svg:x2="3.891cm" svg:y2="10.49cm">
          <text:p/>
        </draw:line>
        <draw:custom-shape draw:style-name="gr30" draw:text-style-name="P15" draw:layer="layout" svg:width="2.688cm" svg:height="1.694cm" svg:x="3.838cm" svg:y="9.526cm">
          <text:p/>
          <draw:enhanced-geometry svg:viewBox="0 0 21600 21600" draw:type="rectangle" draw:enhanced-path="M 0 0 L 21600 0 21600 21600 0 21600 0 0 Z N"/>
        </draw:custom-shape>
        <draw:line draw:style-name="gr2" draw:text-style-name="P14" draw:layer="layout" svg:x1="6.567cm" svg:y1="10.418cm" svg:x2="8.31cm" svg:y2="10.418cm">
          <text:p/>
        </draw:line>
        <draw:custom-shape draw:style-name="gr31" draw:text-style-name="P16" xml:id="id5" draw:id="id5" draw:layer="layout" svg:width="2.688cm" svg:height="1.694cm" svg:x="8.24cm" svg:y="9.52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2.688cm" svg:height="1.695cm" svg:x="12.659cm" svg:y="9.496cm">
          <text:p/>
          <draw:enhanced-geometry svg:viewBox="0 0 21600 21600" draw:type="rectangle" draw:enhanced-path="M 0 0 L 21600 0 21600 21600 0 21600 0 0 Z N"/>
        </draw:custom-shape>
        <draw:line draw:style-name="gr2" draw:text-style-name="P14" draw:layer="layout" svg:x1="10.943cm" svg:y1="10.412cm" svg:x2="12.686cm" svg:y2="10.412cm">
          <text:p/>
        </draw:line>
        <draw:custom-shape draw:style-name="gr33" draw:text-style-name="P16" draw:layer="layout" svg:width="2.688cm" svg:height="1.695cm" svg:x="17.016cm" svg:y="9.52cm">
          <text:p/>
          <draw:enhanced-geometry svg:viewBox="0 0 21600 21600" draw:type="rectangle" draw:enhanced-path="M 0 0 L 21600 0 21600 21600 0 21600 0 0 Z N"/>
        </draw:custom-shape>
        <draw:line draw:style-name="gr2" draw:text-style-name="P14" draw:layer="layout" svg:x1="15.344cm" svg:y1="10.412cm" svg:x2="17.087cm" svg:y2="10.412cm">
          <text:p/>
        </draw:line>
        <draw:line draw:style-name="gr2" draw:text-style-name="P14" draw:layer="layout" svg:x1="19.746cm" svg:y1="10.413cm" svg:x2="21.489cm" svg:y2="10.413cm">
          <text:p/>
        </draw:line>
        <draw:frame draw:style-name="gr34" draw:text-style-name="P17" draw:layer="layout" svg:width="2.102cm" svg:height="0.683cm" svg:x="4.13cm" svg:y="11.234cm">
          <draw:text-box>
            <text:p text:style-name="P5"><text:span text:style-name="T3">alimenter</text:span></text:p>
          </draw:text-box>
        </draw:frame>
        <draw:frame draw:style-name="gr35" draw:text-style-name="P18" draw:layer="layout" svg:width="2.539cm" svg:height="0.683cm" svg:x="8.744cm" svg:y="11.312cm">
          <draw:text-box>
            <text:p><text:span text:style-name="T3">distribuer</text:span></text:p>
          </draw:text-box>
        </draw:frame>
        <draw:frame draw:style-name="gr36" draw:text-style-name="P18" draw:layer="layout" svg:width="1.992cm" svg:height="0.683cm" svg:x="13.069cm" svg:y="11.406cm">
          <draw:text-box>
            <text:p><text:span text:style-name="T3">convertir</text:span></text:p>
          </draw:text-box>
        </draw:frame>
        <draw:frame draw:style-name="gr37" draw:text-style-name="P18" draw:layer="layout" svg:width="3.375cm" svg:height="0.683cm" svg:x="17.114cm" svg:y="11.197cm">
          <draw:text-box>
            <text:p><text:span text:style-name="T3">transmettre</text:span></text:p>
          </draw:text-box>
        </draw:frame>
        <draw:custom-shape draw:style-name="gr30" draw:text-style-name="P15" draw:layer="layout" svg:width="2.688cm" svg:height="1.694cm" svg:x="4.266cm" svg:y="4.5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2.688cm" svg:height="1.694cm" svg:x="8.685cm" svg:y="4.57cm">
          <text:p/>
          <draw:enhanced-geometry svg:viewBox="0 0 21600 21600" draw:type="rectangle" draw:enhanced-path="M 0 0 L 21600 0 21600 21600 0 21600 0 0 Z N"/>
        </draw:custom-shape>
        <draw:line draw:style-name="gr2" draw:text-style-name="P14" draw:layer="layout" svg:x1="6.969cm" svg:y1="5.486cm" svg:x2="8.712cm" svg:y2="5.486cm">
          <text:p/>
        </draw:line>
        <draw:custom-shape draw:style-name="gr38" draw:text-style-name="P15" xml:id="id6" draw:id="id6" draw:layer="layout" svg:width="2.688cm" svg:height="1.695cm" svg:x="13.043cm" svg:y="4.593cm">
          <text:p/>
          <draw:enhanced-geometry svg:viewBox="0 0 21600 21600" draw:type="rectangle" draw:enhanced-path="M 0 0 L 21600 0 21600 21600 0 21600 0 0 Z N"/>
        </draw:custom-shape>
        <draw:line draw:style-name="gr2" draw:text-style-name="P14" draw:layer="layout" svg:x1="11.371cm" svg:y1="5.486cm" svg:x2="13.114cm" svg:y2="5.486cm">
          <text:p/>
        </draw:line>
        <draw:line draw:style-name="gr2" draw:text-style-name="P14" draw:layer="layout" svg:x1="2.502cm" svg:y1="5.486cm" svg:x2="4.245cm" svg:y2="5.486cm">
          <text:p/>
        </draw:line>
        <draw:frame draw:style-name="gr39" draw:text-style-name="P19" draw:layer="layout" svg:width="2.106cm" svg:height="0.683cm" svg:x="4.665cm" svg:y="6.424cm">
          <draw:text-box>
            <text:p><text:span text:style-name="T3">acquérir</text:span></text:p>
          </draw:text-box>
        </draw:frame>
        <draw:frame draw:style-name="gr39" draw:text-style-name="P19" draw:layer="layout" svg:width="1.988cm" svg:height="0.683cm" svg:x="9.083cm" svg:y="6.364cm">
          <draw:text-box>
            <text:p><text:span text:style-name="T3">traiter</text:span></text:p>
          </draw:text-box>
        </draw:frame>
        <draw:frame draw:style-name="gr40" draw:text-style-name="P19" draw:layer="layout" svg:width="3.346cm" svg:height="1.133cm" svg:x="13.15cm" svg:y="6.364cm">
          <draw:text-box>
            <text:p><text:span text:style-name="T3">communiquer</text:span></text:p>
          </draw:text-box>
        </draw:frame>
        <draw:connector draw:style-name="gr21" draw:text-style-name="P20" draw:layer="layout" svg:x1="9.584cm" svg:y1="9.526cm" svg:x2="15.731cm" svg:y2="5.44cm" draw:start-shape="id5" draw:start-glue-point="0" draw:end-shape="id6" draw:end-glue-point="1" svg:d="M9584 9526v-1619h6648v-2467h-501" svg:viewBox="0 0 6649 4087">
          <text:p/>
        </draw:connector>
        <draw:line draw:style-name="gr22" draw:text-style-name="P14" draw:layer="layout" svg:x1="15.715cm" svg:y1="5.055cm" svg:x2="17.919cm" svg:y2="5.055cm">
          <text:p/>
        </draw:line>
        <draw:frame draw:style-name="gr41" draw:text-style-name="P18" draw:layer="layout" svg:width="1.844cm" svg:height="0.683cm" svg:x="18.058cm" svg:y="4.834cm">
          <draw:text-box>
            <text:p><text:span text:style-name="T3">Humain</text:span></text:p>
          </draw:text-box>
        </draw:frame>
      </draw:page>
      <draw:page draw:name="page7" draw:style-name="dp1" draw:master-page-name="Standard">
        <draw:custom-shape draw:style-name="gr4" draw:text-style-name="P2" draw:layer="layout" svg:width="3.97cm" svg:height="2.503cm" svg:x="3.173cm" svg:y="12.038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203cm" svg:y1="13.356cm" svg:x2="9.778cm" svg:y2="13.356cm">
          <text:p/>
        </draw:line>
        <draw:custom-shape draw:style-name="gr4" draw:text-style-name="P2" draw:layer="layout" svg:width="3.97cm" svg:height="2.503cm" svg:x="9.674cm" svg:y="12.0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97cm" svg:height="2.503cm" svg:x="16.201cm" svg:y="11.99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666cm" svg:y1="13.348cm" svg:x2="16.241cm" svg:y2="13.348cm">
          <text:p/>
        </draw:line>
        <draw:custom-shape draw:style-name="gr4" draw:text-style-name="P2" draw:layer="layout" svg:width="3.97cm" svg:height="2.503cm" svg:x="22.637cm" svg:y="12.0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0.167cm" svg:y1="13.348cm" svg:x2="22.742cm" svg:y2="13.348cm">
          <text:p/>
        </draw:line>
        <draw:line draw:style-name="gr2" draw:text-style-name="P3" draw:layer="layout" svg:x1="26.668cm" svg:y1="13.349cm" svg:x2="29.243cm" svg:y2="13.349cm">
          <text:p/>
        </draw:line>
        <draw:line draw:style-name="gr2" draw:text-style-name="P3" draw:layer="layout" svg:x1="0.569cm" svg:y1="13.35cm" svg:x2="3.144cm" svg:y2="13.35cm">
          <text:p/>
        </draw:line>
        <draw:frame draw:style-name="gr10" draw:text-style-name="P3" draw:layer="layout" svg:width="9.313cm" svg:height="10.195cm" svg:x="9.366cm" svg:y="0.924cm">
          <draw:image xlink:href="Pictures/10000001000002F900000341AC376141.png" xlink:type="simple" xlink:show="embed" xlink:actuate="onLoad" draw:mime-type="image/png">
            <text:p/>
          </draw:image>
        </draw:frame>
        <draw:line draw:style-name="gr42" draw:text-style-name="P3" draw:layer="layout" svg:x1="15.187cm" svg:y1="2.857cm" svg:x2="7.408cm" svg:y2="2.857cm">
          <text:p/>
        </draw:line>
        <draw:line draw:style-name="gr42" draw:text-style-name="P3" draw:layer="layout" svg:x1="23.088cm" svg:y1="3.157cm" svg:x2="15.309cm" svg:y2="3.157cm">
          <text:p/>
        </draw:line>
        <draw:line draw:style-name="gr42" draw:text-style-name="P3" draw:layer="layout" svg:x1="13.489cm" svg:y1="6.057cm" svg:x2="11.218cm" svg:y2="4.709cm">
          <text:p/>
        </draw:line>
        <draw:line draw:style-name="gr42" draw:text-style-name="P3" draw:layer="layout" svg:x1="11.43cm" svg:y1="6.614cm" svg:x2="8.202cm" svg:y2="6.667cm">
          <text:p/>
        </draw:line>
        <draw:line draw:style-name="gr42" draw:text-style-name="P3" draw:layer="layout" svg:x1="11.006cm" svg:y1="7.884cm" svg:x2="8.102cm" svg:y2="7.902cm">
          <text:p/>
        </draw:line>
        <draw:line draw:style-name="gr42" draw:text-style-name="P3" draw:layer="layout" svg:x1="7.831cm" svg:y1="4.604cm" svg:x2="11.219cm" svg:y2="4.709cm">
          <text:p/>
        </draw:line>
        <draw:line draw:style-name="gr42" draw:text-style-name="P3" draw:layer="layout" svg:x1="13.19cm" svg:y1="7.358cm" svg:x2="11.483cm" svg:y2="6.562cm">
          <text:p/>
        </draw:line>
        <draw:frame draw:style-name="gr43" draw:text-style-name="P4" draw:layer="layout" svg:width="3.148cm" svg:height="0.962cm" svg:x="4.286cm" svg:y="2.38cm">
          <draw:text-box>
            <text:p>réflecteur</text:p>
          </draw:text-box>
        </draw:frame>
        <draw:frame draw:style-name="gr44" draw:text-style-name="P4" draw:layer="layout" svg:width="1.747cm" svg:height="0.962cm" svg:x="6.597cm" svg:y="4.286cm">
          <draw:text-box>
            <text:p>fil</text:p>
          </draw:text-box>
        </draw:frame>
        <draw:frame draw:style-name="gr7" draw:text-style-name="P4" draw:layer="layout" svg:width="3.749cm" svg:height="0.962cm" svg:x="4.544cm" svg:y="6.19cm">
          <draw:text-box>
            <text:p>interrupteur</text:p>
          </draw:text-box>
        </draw:frame>
        <draw:frame draw:style-name="gr45" draw:text-style-name="P4" draw:layer="layout" svg:width="3.921cm" svg:height="3.229cm" svg:x="5.868cm" svg:y="7.354cm">
          <draw:text-box>
            <text:p>prise</text:p>
          </draw:text-box>
        </draw:frame>
        <draw:frame draw:style-name="gr8" draw:text-style-name="P4" draw:layer="layout" svg:width="2.936cm" svg:height="0.962cm" svg:x="23.177cm" svg:y="2.857cm">
          <draw:text-box>
            <text:p>ampoule</text:p>
          </draw:text-box>
        </draw:frame>
        <draw:frame draw:style-name="gr19" draw:text-style-name="P10" draw:layer="layout" svg:width="3.11cm" svg:height="0.963cm" svg:x="3.604cm" svg:y="14.821cm">
          <draw:text-box>
            <text:p>alimenter</text:p>
          </draw:text-box>
        </draw:frame>
        <draw:frame draw:style-name="gr19" draw:text-style-name="P10" draw:layer="layout" svg:width="3.11cm" svg:height="0.963cm" svg:x="10.263cm" svg:y="14.734cm">
          <draw:text-box>
            <text:p>distribuer</text:p>
          </draw:text-box>
        </draw:frame>
        <draw:frame draw:style-name="gr19" draw:text-style-name="P10" draw:layer="layout" svg:width="2.936cm" svg:height="0.963cm" svg:x="16.788cm" svg:y="14.646cm">
          <draw:text-box>
            <text:p>convertir</text:p>
          </draw:text-box>
        </draw:frame>
        <draw:frame draw:style-name="gr19" draw:text-style-name="P10" draw:layer="layout" svg:width="3.711cm" svg:height="0.963cm" svg:x="22.795cm" svg:y="14.646cm">
          <draw:text-box>
            <text:p>transmettre</text:p>
          </draw:text-box>
        </draw:frame>
      </draw:page>
      <draw:page draw:name="page8" draw:style-name="dp1" draw:master-page-name="Standard">
        <draw:frame draw:style-name="gr46" draw:text-style-name="P3" draw:layer="layout" svg:width="8.157cm" svg:height="7.328cm" svg:x="8.864cm" svg:y="4.093cm">
          <draw:image xlink:href="Pictures/10000001000003CD0000020231C24CD9.png" xlink:type="simple" xlink:show="embed" xlink:actuate="onLoad" draw:mime-type="image/png">
            <text:p/>
          </draw:image>
        </draw:frame>
        <draw:custom-shape draw:style-name="gr4" draw:text-style-name="P2" draw:layer="layout" svg:width="3.97cm" svg:height="2.503cm" svg:x="3.173cm" svg:y="12.038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203cm" svg:y1="13.356cm" svg:x2="9.778cm" svg:y2="13.356cm">
          <text:p/>
        </draw:line>
        <draw:custom-shape draw:style-name="gr4" draw:text-style-name="P2" draw:layer="layout" svg:width="3.97cm" svg:height="2.503cm" svg:x="9.674cm" svg:y="12.0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97cm" svg:height="2.503cm" svg:x="16.201cm" svg:y="11.99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666cm" svg:y1="13.348cm" svg:x2="16.241cm" svg:y2="13.348cm">
          <text:p/>
        </draw:line>
        <draw:custom-shape draw:style-name="gr4" draw:text-style-name="P2" draw:layer="layout" svg:width="3.97cm" svg:height="2.503cm" svg:x="22.637cm" svg:y="12.0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0.167cm" svg:y1="13.348cm" svg:x2="22.742cm" svg:y2="13.348cm">
          <text:p/>
        </draw:line>
        <draw:line draw:style-name="gr2" draw:text-style-name="P3" draw:layer="layout" svg:x1="26.668cm" svg:y1="13.349cm" svg:x2="29.243cm" svg:y2="13.349cm">
          <text:p/>
        </draw:line>
        <draw:line draw:style-name="gr2" draw:text-style-name="P3" draw:layer="layout" svg:x1="0.569cm" svg:y1="13.35cm" svg:x2="3.144cm" svg:y2="13.35cm">
          <text:p/>
        </draw:line>
        <draw:frame draw:style-name="gr19" draw:text-style-name="P10" draw:layer="layout" svg:width="3.11cm" svg:height="0.963cm" svg:x="3.604cm" svg:y="14.821cm">
          <draw:text-box>
            <text:p>alimenter</text:p>
          </draw:text-box>
        </draw:frame>
        <draw:frame draw:style-name="gr19" draw:text-style-name="P10" draw:layer="layout" svg:width="3.11cm" svg:height="0.963cm" svg:x="10.263cm" svg:y="14.734cm">
          <draw:text-box>
            <text:p>distribuer</text:p>
          </draw:text-box>
        </draw:frame>
        <draw:frame draw:style-name="gr19" draw:text-style-name="P10" draw:layer="layout" svg:width="2.936cm" svg:height="0.963cm" svg:x="16.788cm" svg:y="14.646cm">
          <draw:text-box>
            <text:p>convertir</text:p>
          </draw:text-box>
        </draw:frame>
        <draw:frame draw:style-name="gr19" draw:text-style-name="P10" draw:layer="layout" svg:width="3.711cm" svg:height="0.963cm" svg:x="22.795cm" svg:y="14.646cm">
          <draw:text-box>
            <text:p>transmettre</text:p>
          </draw:text-box>
        </draw:frame>
      </draw:page>
      <draw:page draw:name="page9" draw:style-name="dp1" draw:master-page-name="Standard">
        <draw:frame draw:style-name="gr46" draw:text-style-name="P3" draw:layer="layout" svg:width="8.157cm" svg:height="7.328cm" svg:x="8.864cm" svg:y="4.093cm">
          <draw:image xlink:href="Pictures/10000001000003CD0000020231C24CD9.png" xlink:type="simple" xlink:show="embed" xlink:actuate="onLoad" draw:mime-type="image/png">
            <text:p/>
          </draw:image>
        </draw:frame>
        <draw:custom-shape draw:style-name="gr4" draw:text-style-name="P2" draw:layer="layout" svg:width="3.97cm" svg:height="2.503cm" svg:x="3.173cm" svg:y="12.038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203cm" svg:y1="13.356cm" svg:x2="9.778cm" svg:y2="13.356cm">
          <text:p/>
        </draw:line>
        <draw:custom-shape draw:style-name="gr4" draw:text-style-name="P2" draw:layer="layout" svg:width="3.97cm" svg:height="2.503cm" svg:x="9.674cm" svg:y="12.0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97cm" svg:height="2.503cm" svg:x="16.201cm" svg:y="11.99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666cm" svg:y1="13.348cm" svg:x2="16.241cm" svg:y2="13.348cm">
          <text:p/>
        </draw:line>
        <draw:custom-shape draw:style-name="gr4" draw:text-style-name="P2" draw:layer="layout" svg:width="3.97cm" svg:height="2.503cm" svg:x="22.637cm" svg:y="12.0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0.167cm" svg:y1="13.348cm" svg:x2="22.742cm" svg:y2="13.348cm">
          <text:p/>
        </draw:line>
        <draw:line draw:style-name="gr2" draw:text-style-name="P3" draw:layer="layout" svg:x1="26.668cm" svg:y1="13.349cm" svg:x2="29.243cm" svg:y2="13.349cm">
          <text:p/>
        </draw:line>
        <draw:line draw:style-name="gr2" draw:text-style-name="P3" draw:layer="layout" svg:x1="0.569cm" svg:y1="13.35cm" svg:x2="3.144cm" svg:y2="13.35cm">
          <text:p/>
        </draw:line>
        <draw:frame draw:style-name="gr19" draw:text-style-name="P21" draw:layer="layout" svg:width="3.11cm" svg:height="0.963cm" svg:x="3.604cm" svg:y="14.821cm">
          <draw:text-box>
            <text:p><text:span text:style-name="T4">alimenter</text:span></text:p>
          </draw:text-box>
        </draw:frame>
        <draw:frame draw:style-name="gr19" draw:text-style-name="P21" draw:layer="layout" svg:width="3.11cm" svg:height="0.963cm" svg:x="10.263cm" svg:y="14.734cm">
          <draw:text-box>
            <text:p><text:span text:style-name="T4">distribuer</text:span></text:p>
          </draw:text-box>
        </draw:frame>
        <draw:frame draw:style-name="gr19" draw:text-style-name="P21" draw:layer="layout" svg:width="2.936cm" svg:height="0.963cm" svg:x="16.788cm" svg:y="14.646cm">
          <draw:text-box>
            <text:p><text:span text:style-name="T4">convertir</text:span></text:p>
          </draw:text-box>
        </draw:frame>
        <draw:frame draw:style-name="gr19" draw:text-style-name="P21" draw:layer="layout" svg:width="3.711cm" svg:height="0.963cm" svg:x="22.795cm" svg:y="14.646cm">
          <draw:text-box>
            <text:p><text:span text:style-name="T4">transmettre</text:span></text:p>
          </draw:text-box>
        </draw:frame>
      </draw:page>
      <draw:page draw:name="page10" draw:style-name="dp1" draw:master-page-name="Standard">
        <draw:frame draw:style-name="gr46" draw:text-style-name="P3" draw:layer="layout" svg:width="12.663cm" svg:height="11.376cm" svg:x="8.864cm" svg:y="0.046cm">
          <draw:image xlink:href="Pictures/10000001000003CD0000020231C24CD9.png" xlink:type="simple" xlink:show="embed" xlink:actuate="onLoad" draw:mime-type="image/png">
            <text:p/>
          </draw:image>
        </draw:frame>
        <draw:custom-shape draw:style-name="gr4" draw:text-style-name="P2" draw:layer="layout" svg:width="3.97cm" svg:height="2.503cm" svg:x="3.173cm" svg:y="12.039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203cm" svg:y1="13.357cm" svg:x2="9.778cm" svg:y2="13.357cm">
          <text:p/>
        </draw:line>
        <draw:custom-shape draw:style-name="gr4" draw:text-style-name="P2" draw:layer="layout" svg:width="3.97cm" svg:height="2.503cm" svg:x="9.674cm" svg:y="12.0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97cm" svg:height="2.503cm" svg:x="16.201cm" svg:y="11.996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666cm" svg:y1="13.349cm" svg:x2="16.241cm" svg:y2="13.349cm">
          <text:p/>
        </draw:line>
        <draw:custom-shape draw:style-name="gr4" draw:text-style-name="P2" draw:layer="layout" svg:width="3.97cm" svg:height="2.503cm" svg:x="22.637cm" svg:y="12.031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0.167cm" svg:y1="13.349cm" svg:x2="22.742cm" svg:y2="13.349cm">
          <text:p/>
        </draw:line>
        <draw:line draw:style-name="gr2" draw:text-style-name="P3" draw:layer="layout" svg:x1="26.668cm" svg:y1="13.35cm" svg:x2="29.243cm" svg:y2="13.35cm">
          <text:p/>
        </draw:line>
        <draw:line draw:style-name="gr2" draw:text-style-name="P3" draw:layer="layout" svg:x1="0.569cm" svg:y1="13.351cm" svg:x2="3.144cm" svg:y2="13.351cm">
          <text:p/>
        </draw:line>
        <draw:frame draw:style-name="gr19" draw:text-style-name="P10" draw:layer="layout" svg:width="3.11cm" svg:height="0.963cm" svg:x="3.604cm" svg:y="14.822cm">
          <draw:text-box>
            <text:p>alimenter</text:p>
          </draw:text-box>
        </draw:frame>
        <draw:frame draw:style-name="gr19" draw:text-style-name="P10" draw:layer="layout" svg:width="3.11cm" svg:height="0.963cm" svg:x="10.263cm" svg:y="14.735cm">
          <draw:text-box>
            <text:p>distribuer</text:p>
          </draw:text-box>
        </draw:frame>
        <draw:frame draw:style-name="gr19" draw:text-style-name="P10" draw:layer="layout" svg:width="2.936cm" svg:height="0.963cm" svg:x="16.788cm" svg:y="14.647cm">
          <draw:text-box>
            <text:p>convertir</text:p>
          </draw:text-box>
        </draw:frame>
        <draw:frame draw:style-name="gr19" draw:text-style-name="P10" draw:layer="layout" svg:width="3.711cm" svg:height="0.963cm" svg:x="22.795cm" svg:y="14.647cm">
          <draw:text-box>
            <text:p>transmettre</text:p>
          </draw:text-box>
        </draw:frame>
        <draw:frame draw:style-name="gr47" draw:text-style-name="P22" draw:layer="layout" svg:width="3.144cm" svg:height="0.806cm" svg:x="14.913cm" svg:y="5.916cm">
          <draw:text-box>
            <text:p><text:span text:style-name="T5">Carburateur</text:span></text:p>
          </draw:text-box>
        </draw:frame>
        <draw:frame draw:style-name="gr48" draw:text-style-name="P22" draw:layer="layout" svg:width="2.911cm" svg:height="1.427cm" svg:x="13.111cm" svg:y="3.318cm">
          <draw:text-box>
            <text:p><text:span text:style-name="T6">Réservoir </text:span></text:p>
            <text:p><text:span text:style-name="T6">d’essence</text:span></text:p>
          </draw:text-box>
        </draw:frame>
        <draw:frame draw:style-name="gr49" draw:text-style-name="P22" draw:layer="layout" svg:width="2.068cm" svg:height="0.806cm" svg:x="12.483cm" svg:y="10.029cm">
          <draw:text-box>
            <text:p><text:span text:style-name="T5">Chaine</text:span></text:p>
          </draw:text-box>
        </draw:frame>
        <draw:frame draw:style-name="gr50" draw:text-style-name="P22" draw:layer="layout" svg:width="2.043cm" svg:height="0.806cm" svg:x="9.741cm" svg:y="9.957cm">
          <draw:text-box>
            <text:p><text:span text:style-name="T5">Moteur</text:span></text:p>
          </draw:text-box>
        </draw:frame>
      </draw:page>
      <draw:page draw:name="page11" draw:style-name="dp1" draw:master-page-name="Standard">
        <draw:frame draw:style-name="gr10" draw:text-style-name="P3" draw:layer="layout" svg:width="19.102cm" svg:height="14.816cm" svg:x="5.591cm" svg:y="2.484cm">
          <draw:image xlink:href="Pictures/10000000000002D20000023089E195D1.png" xlink:type="simple" xlink:show="embed" xlink:actuate="onLoad" draw:mime-type="image/png">
            <text:p/>
          </draw:image>
        </draw:frame>
        <draw:line draw:style-name="gr51" draw:text-style-name="P3" draw:layer="layout" svg:x1="23.3cm" svg:y1="10.369cm" svg:x2="16.47cm" svg:y2="10.369cm">
          <text:p/>
        </draw:line>
        <draw:frame draw:style-name="gr52" draw:text-style-name="P23" draw:layer="layout" svg:width="0.794cm" svg:height="0.839cm" svg:x="23.333cm" svg:y="9.955cm">
          <draw:text-box>
            <text:p><text:span text:style-name="T6">4</text:span></text:p>
          </draw:text-box>
        </draw:frame>
        <draw:frame draw:style-name="gr53" draw:text-style-name="P24" draw:layer="layout" svg:width="0.314cm" svg:height="0.839cm" svg:x="23.466cm" svg:y="11.312cm">
          <draw:text-box>
            <text:p><text:span text:style-name="T6">5</text:span></text:p>
          </draw:text-box>
        </draw:frame>
        <draw:frame draw:style-name="gr53" draw:text-style-name="P24" draw:layer="layout" svg:width="0.314cm" svg:height="0.839cm" svg:x="23.477cm" svg:y="11.313cm">
          <draw:text-box>
            <text:p><text:span text:style-name="T6">5</text:span></text:p>
          </draw:text-box>
        </draw:frame>
        <draw:frame draw:style-name="gr53" draw:text-style-name="P24" draw:layer="layout" svg:width="0.314cm" svg:height="0.839cm" svg:x="23.72cm" svg:y="14.266cm">
          <draw:text-box>
            <text:p><text:span text:style-name="T6">6</text:span></text:p>
          </draw:text-box>
        </draw:frame>
        <draw:frame draw:style-name="gr53" draw:text-style-name="P24" draw:layer="layout" svg:width="0.314cm" svg:height="0.839cm" svg:x="23.789cm" svg:y="16.148cm">
          <draw:text-box>
            <text:p><text:span text:style-name="T6">7</text:span></text:p>
          </draw:text-box>
        </draw:frame>
      </draw:page>
      <draw:page draw:name="page12" draw:style-name="dp1" draw:master-page-name="Standard">
        <draw:frame draw:style-name="gr54" draw:text-style-name="P1" draw:layer="layout" svg:width="22.885cm" svg:height="18.573cm" svg:x="4.115cm" svg:y="1cm">
          <draw:image xlink:href="Pictures/1000000100000361000002BE54C2801B.png" xlink:type="simple" xlink:show="embed" xlink:actuate="onLoad" draw:mime-type="image/png">
            <text:p/>
          </draw:image>
        </draw:frame>
        <draw:frame draw:style-name="gr55" draw:text-style-name="P4" draw:layer="layout" svg:width="6.323cm" svg:height="0.962cm" svg:x="5.844cm" svg:y="11.295cm">
          <draw:text-box>
            <text:p>Chaine d’information</text:p>
          </draw:text-box>
        </draw:frame>
        <draw:frame draw:style-name="gr55" draw:text-style-name="P4" draw:layer="layout" svg:width="5.303cm" svg:height="0.962cm" svg:x="5.924cm" svg:y="15.52cm">
          <draw:text-box>
            <text:p>Chaine d’énergie</text:p>
          </draw:text-box>
        </draw:frame>
        <draw:frame draw:style-name="gr55" draw:text-style-name="P4" draw:layer="layout" svg:width="0.853cm" svg:height="0.962cm" svg:x="6.989cm" svg:y="12.678cm">
          <draw:text-box>
            <text:p>6</text:p>
          </draw:text-box>
        </draw:frame>
        <draw:frame draw:style-name="gr55" draw:text-style-name="P4" draw:layer="layout" svg:width="0.853cm" svg:height="0.962cm" svg:x="10.544cm" svg:y="12.599cm">
          <draw:text-box>
            <text:p>4</text:p>
          </draw:text-box>
        </draw:frame>
        <draw:frame draw:style-name="gr55" draw:text-style-name="P4" draw:layer="layout" svg:width="0.853cm" svg:height="0.962cm" svg:x="6.99cm" svg:y="12.678cm">
          <draw:text-box>
            <text:p>6</text:p>
          </draw:text-box>
        </draw:frame>
        <draw:frame draw:style-name="gr55" draw:text-style-name="P4" draw:layer="layout" svg:width="2.441cm" svg:height="0.962cm" svg:x="12.992cm" svg:y="12.599cm">
          <draw:text-box>
            <text:p>1 et 10</text:p>
          </draw:text-box>
        </draw:frame>
        <draw:frame draw:style-name="gr55" draw:text-style-name="P4" draw:layer="layout" svg:width="0.853cm" svg:height="0.962cm" svg:x="17.14cm" svg:y="17.22cm">
          <draw:text-box>
            <text:p>9</text:p>
          </draw:text-box>
        </draw:frame>
        <draw:frame draw:style-name="gr55" draw:text-style-name="P4" draw:layer="layout" svg:width="0.853cm" svg:height="0.962cm" svg:x="13.705cm" svg:y="17.26cm">
          <draw:text-box>
            <text:p>8</text:p>
          </draw:text-box>
        </draw:frame>
        <draw:frame draw:style-name="gr55" draw:text-style-name="P4" draw:layer="layout" svg:width="2.75cm" svg:height="0.962cm" svg:x="9.439cm" svg:y="17.14cm">
          <draw:text-box>
            <text:p>11 et 10</text:p>
          </draw:text-box>
        </draw:frame>
        <draw:frame draw:style-name="gr55" draw:text-style-name="P4" draw:layer="layout" svg:width="1.205cm" svg:height="0.962cm" svg:x="5.964cm" svg:y="17.179cm">
          <draw:text-box>
            <text:p>12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3" draw:display-name="Extrémités de flèche 3" svg:viewBox="0 0 1013 1130" svg:d="M1009 1050l-449-1008-22-30-29-12-34 12-21 26-449 1012-5 13v8l5 21 12 21 17 13 21 4h903l21-4 21-13 9-21 4-21v-8z"/>
    <draw:marker draw:name="Extrémités_20_de_20_flèche_20_4" draw:display-name="Extrémités de flèche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1T20:53:28.487634874</meta:creation-date>
    <dc:date>2026-06-12T23:26:59.043264625</dc:date>
    <meta:editing-duration>PT2H59M16S</meta:editing-duration>
    <meta:editing-cycles>12</meta:editing-cycles>
    <meta:generator>LibreOffice/24.2.7.2$Linux_X86_64 LibreOffice_project/420$Build-2</meta:generator>
    <meta:document-statistic meta:object-count="225"/>
  </office:meta>
</office:document-meta>
</file>