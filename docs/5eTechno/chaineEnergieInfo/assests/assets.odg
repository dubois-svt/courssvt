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F0000012DE783619C.png" manifest:media-type="image/png"/>
  <manifest:file-entry manifest:full-path="Pictures/100000010000019F000000CC26B70710.png" manifest:media-type="image/png"/>
  <manifest:file-entry manifest:full-path="Pictures/10000001000001DA0000016317D89016.png" manifest:media-type="image/png"/>
  <manifest:file-entry manifest:full-path="Pictures/10000001000001DA00000163A0F8A59D.png" manifest:media-type="image/png"/>
  <manifest:file-entry manifest:full-path="Pictures/10000001000001DA000001DAAE4DCF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3.343cm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3cm" fo:min-width="3.47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5cm, 0.662cm, 4.273cm, 8.703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6cm, 1.032cm, 3.902cm, 6.428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41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35cm" svg:height="2.896cm" svg:x="7.33cm" svg:y="2.682cm">
          <text:p text:style-name="P1">éol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4.147cm" svg:x2="15.339cm" svg:y2="4.147cm">
          <text:p/>
        </draw:line>
        <draw:line draw:style-name="gr2" draw:text-style-name="P3" draw:layer="layout" svg:x1="4.765cm" svg:y1="4.148cm" svg:x2="7.34cm" svg:y2="4.148cm">
          <text:p/>
        </draw:line>
        <draw:custom-shape draw:style-name="gr1" draw:text-style-name="P2" draw:layer="layout" svg:width="5.435cm" svg:height="2.896cm" svg:x="7.33cm" svg:y="14.683cm">
          <text:p text:style-name="P1">Lam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16.148cm" svg:x2="15.339cm" svg:y2="16.148cm">
          <text:p/>
        </draw:line>
        <draw:line draw:style-name="gr2" draw:text-style-name="P3" draw:layer="layout" svg:x1="4.765cm" svg:y1="16.149cm" svg:x2="7.34cm" svg:y2="16.149cm">
          <text:p/>
        </draw:line>
        <draw:frame draw:style-name="gr3" draw:text-style-name="P4" draw:layer="layout" svg:width="3.254cm" svg:height="1.673cm" svg:x="15.454cm" svg:y="3.254cm">
          <draw:text-box>
            <text:p>Énergie</text:p>
            <text:p>électrique</text:p>
          </draw:text-box>
        </draw:frame>
        <draw:custom-shape draw:style-name="gr1" draw:text-style-name="P2" draw:layer="layout" svg:width="5.435cm" svg:height="2.896cm" svg:x="7.33cm" svg:y="8.184cm">
          <text:p text:style-name="P1">Radiateur</text:p>
          <text:p text:style-name="P1">électr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9.649cm" svg:x2="15.339cm" svg:y2="9.649cm">
          <text:p/>
        </draw:line>
        <draw:line draw:style-name="gr2" draw:text-style-name="P3" draw:layer="layout" svg:x1="4.765cm" svg:y1="9.65cm" svg:x2="7.34cm" svg:y2="9.65cm">
          <text:p/>
        </draw:line>
        <draw:frame draw:style-name="gr3" draw:text-style-name="P4" draw:layer="layout" svg:width="3.254cm" svg:height="1.673cm" svg:x="2.011cm" svg:y="8.796cm">
          <draw:text-box>
            <text:p>Énergie</text:p>
            <text:p>électrique</text:p>
          </draw:text-box>
        </draw:frame>
        <draw:custom-shape draw:style-name="gr4" draw:text-style-name="P2" draw:layer="layout" svg:width="3.97cm" svg:height="2.503cm" svg:x="1cm" svg:y="21.596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65cm" svg:y1="22.949cm" svg:x2="7.54cm" svg:y2="22.949cm">
          <text:p/>
        </draw:line>
        <draw:custom-shape draw:style-name="gr4" draw:text-style-name="P2" draw:layer="layout" svg:width="3.97cm" svg:height="2.503cm" svg:x="7.436cm" svg:y="21.631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66cm" svg:y1="22.949cm" svg:x2="14.041cm" svg:y2="22.949cm">
          <text:p/>
        </draw:line>
        <draw:custom-shape draw:style-name="gr4" draw:text-style-name="P2" draw:layer="layout" svg:width="3.97cm" svg:height="2.503cm" svg:x="13.937cm" svg:y="21.631cm">
          <text:p text:style-name="P1">alimen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2" draw:text-style-name="P3" draw:layer="layout" svg:x1="4.076cm" svg:y1="13.462cm" svg:x2="6.651cm" svg:y2="13.462cm">
          <text:p/>
        </draw:line>
        <draw:custom-shape draw:style-name="gr4" draw:text-style-name="P2" draw:layer="layout" svg:width="3.97cm" svg:height="2.503cm" svg:x="6.573cm" svg:y="12.038cm">
          <text:p text:style-name="P1">stock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03cm" svg:y1="13.356cm" svg:x2="13.178cm" svg:y2="13.356cm">
          <text:p/>
        </draw:line>
        <draw:custom-shape draw:style-name="gr4" draw:text-style-name="P2" draw:layer="layout" svg:width="3.97cm" svg:height="2.503cm" svg:x="13.074cm" svg:y="12.038cm">
          <text:p text:style-name="P1">distribu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9.601cm" svg:y="11.995cm">
          <text:p text:style-name="P1">converti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066cm" svg:y1="13.348cm" svg:x2="19.641cm" svg:y2="13.348cm">
          <text:p/>
        </draw:line>
        <draw:custom-shape draw:style-name="gr4" draw:text-style-name="P2" draw:layer="layout" svg:width="3.97cm" svg:height="2.503cm" svg:x="26.037cm" svg:y="12.03cm">
          <text:p text:style-name="P1">transmettr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567cm" svg:y1="13.348cm" svg:x2="26.142cm" svg:y2="13.348cm">
          <text:p/>
        </draw:line>
        <draw:line draw:style-name="gr5" draw:text-style-name="P3" draw:layer="layout" svg:x1="6.409cm" svg:y1="16.669cm" svg:x2="10.23cm" svg:y2="16.669cm">
          <text:p/>
        </draw:line>
        <draw:line draw:style-name="gr5" draw:text-style-name="P3" draw:layer="layout" svg:x1="6.41cm" svg:y1="16.669cm" svg:x2="10.231cm" svg:y2="16.669cm">
          <text:p/>
        </draw:line>
        <draw:line draw:style-name="gr5" draw:text-style-name="P3" draw:layer="layout" svg:x1="13.114cm" svg:y1="16.634cm" svg:x2="16.935cm" svg:y2="16.634cm">
          <text:p/>
        </draw:line>
        <draw:line draw:style-name="gr5" draw:text-style-name="P3" draw:layer="layout" svg:x1="19.811cm" svg:y1="16.669cm" svg:x2="23.632cm" svg:y2="16.669cm">
          <text:p/>
        </draw:line>
        <draw:line draw:style-name="gr5" draw:text-style-name="P3" draw:layer="layout" svg:x1="26.135cm" svg:y1="16.58cm" svg:x2="30.074cm" svg:y2="16.609cm">
          <text:p/>
        </draw:line>
        <draw:line draw:style-name="gr2" draw:text-style-name="P3" draw:layer="layout" svg:x1="30.068cm" svg:y1="13.349cm" svg:x2="32.643cm" svg:y2="13.349cm">
          <text:p/>
        </draw:line>
        <draw:frame draw:style-name="gr3" draw:text-style-name="P4" draw:layer="layout" svg:width="2.619cm" svg:height="0.962cm" svg:x="7.091cm" svg:y="15.663cm">
          <draw:text-box>
            <text:p>batterie</text:p>
          </draw:text-box>
        </draw:frame>
        <draw:frame draw:style-name="gr3" draw:text-style-name="P4" draw:layer="layout" svg:width="3.749cm" svg:height="0.962cm" svg:x="13.201cm" svg:y="15.557cm">
          <draw:text-box>
            <text:p>interrupteur</text:p>
          </draw:text-box>
        </draw:frame>
        <draw:frame draw:style-name="gr3" draw:text-style-name="P4" draw:layer="layout" svg:width="2.475cm" svg:height="0.962cm" svg:x="20.516cm" svg:y="15.609cm">
          <draw:text-box>
            <text:p>moteur</text:p>
          </draw:text-box>
        </draw:frame>
        <draw:frame draw:style-name="gr3" draw:text-style-name="P4" draw:layer="layout" svg:width="4.985cm" svg:height="0.962cm" svg:x="25.917cm" svg:y="15.609cm">
          <draw:text-box>
            <text:p>roue/engrenage</text:p>
          </draw:text-box>
        </draw:frame>
        <draw:frame draw:style-name="gr6" draw:text-style-name="P1" draw:layer="layout" svg:width="4.683cm" svg:height="4.683cm" svg:x="6.218cm" svg:y="6.853cm">
          <draw:image xlink:href="Pictures/10000001000001DA000001DAAE4DCF04.png" xlink:type="simple" xlink:show="embed" xlink:actuate="onLoad" draw:mime-type="image/png">
            <text:p/>
          </draw:image>
        </draw:frame>
        <draw:frame draw:style-name="gr7" draw:text-style-name="P1" draw:layer="layout" svg:width="3.174cm" svg:height="2.433cm" svg:x="13.334cm" svg:y="7.779cm">
          <draw:image xlink:href="Pictures/10000001000001DA00000163A0F8A59D.png" xlink:type="simple" xlink:show="embed" xlink:actuate="onLoad" draw:mime-type="image/png">
            <text:p/>
          </draw:image>
        </draw:frame>
        <draw:frame draw:style-name="gr8" draw:text-style-name="P1" draw:layer="layout" svg:width="5.079cm" svg:height="4.073cm" svg:x="19.261cm" svg:y="7.197cm">
          <draw:image xlink:href="Pictures/10000001000001DA0000016317D89016.png" xlink:type="simple" xlink:show="embed" xlink:actuate="onLoad" draw:mime-type="image/png">
            <text:p/>
          </draw:image>
        </draw:frame>
        <draw:frame draw:style-name="gr6" draw:text-style-name="P1" draw:layer="layout" svg:width="5.491cm" svg:height="2.699cm" svg:x="26.086cm" svg:y="4.498cm">
          <draw:image xlink:href="Pictures/100000010000019F000000CC26B70710.png" xlink:type="simple" xlink:show="embed" xlink:actuate="onLoad" draw:mime-type="image/png">
            <text:p/>
          </draw:image>
        </draw:frame>
        <draw:frame draw:style-name="gr9" draw:text-style-name="P1" draw:layer="layout" svg:width="4.921cm" svg:height="4.695cm" svg:x="26.087cm" svg:y="7.342cm">
          <draw:image xlink:href="Pictures/100000010000022F0000012DE78361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20:53:28.487634874</meta:creation-date>
    <dc:date>2026-05-21T21:35:37.547732009</dc:date>
    <meta:editing-duration>PT12M20S</meta:editing-duration>
    <meta:editing-cycles>2</meta:editing-cycles>
    <meta:generator>LibreOffice/24.2.7.2$Linux_X86_64 LibreOffice_project/420$Build-2</meta:generator>
    <meta:document-statistic meta:object-count="39"/>
  </office:meta>
</office:document-meta>
</file>