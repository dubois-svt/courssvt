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900000341AC376141.png" manifest:media-type="image/png"/>
  <manifest:file-entry manifest:full-path="Pictures/100000010000022F0000012DE783619C.png" manifest:media-type="image/png"/>
  <manifest:file-entry manifest:full-path="Pictures/10000001000001DA0000016333DADDBC.png" manifest:media-type="image/png"/>
  <manifest:file-entry manifest:full-path="Pictures/100000010000019F000000CC26B70710.png" manifest:media-type="image/png"/>
  <manifest:file-entry manifest:full-path="Pictures/10000000000002D20000023089E195D1.png" manifest:media-type="image/png"/>
  <manifest:file-entry manifest:full-path="Pictures/10000001000003CD0000020231C24CD9.png" manifest:media-type="image/png"/>
  <manifest:file-entry manifest:full-path="Pictures/10000001000001DA0000016317D89016.png" manifest:media-type="image/png"/>
  <manifest:file-entry manifest:full-path="Pictures/10000001000001DA000001DAAE4DCF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3.34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54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6cm, 1.032cm, 3.902cm, 6.428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41cm, 0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57cm, 0cm, 1.611cm, 6.049cm)" draw:image-opacity="100%" style:mirror="none" loext:decorative="false"/>
    </style:style>
    <style:style style:name="gr13" style:family="graphic" style:parent-style-name="standard">
      <style:graphic-properties draw:fill-color="#e16173" draw:textarea-horizontal-align="justify" draw:textarea-vertical-align="bottom" draw:auto-grow-height="false" fo:min-height="6.497cm" fo:min-width="20.707cm" loext:decorative="false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bottom" draw:auto-grow-height="false" fo:min-height="6.497cm" fo:min-width="29.046cm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0" style:family="graphic" style:parent-style-name="standard">
      <style:graphic-properties draw:marker-start="Extrémités_20_de_20_flèche_20_3" draw:marker-end="" draw:textarea-horizontal-align="center" draw:textarea-vertical-align="middle" loext:decorative="false"/>
    </style:style>
    <style:style style:name="gr21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9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635cm, 6.27cm, 6.95cm)" draw:image-opacity="100%" style:mirror="none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objectwithoutfill">
      <style:graphic-properties svg:stroke-width="0.159cm" svg:stroke-color="#000000" draw:marker-start-width="0.437cm" draw:marker-end-width="0.437cm" draw:stroke-linejoin="round" svg:stroke-linecap="round" draw:fill="none" draw:textarea-vertical-align="middle" fo:padding-top="0.203cm" fo:padding-bottom="0.203cm" fo:padding-left="0.328cm" fo:padding-right="0.328cm" loext:decorative="false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e16173"/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-color="#d4ea6b"/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solid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35cm" svg:height="2.896cm" svg:x="7.33cm" svg:y="2.682cm">
          <text:p text:style-name="P1">éol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4.147cm" svg:x2="15.339cm" svg:y2="4.147cm">
          <text:p/>
        </draw:line>
        <draw:line draw:style-name="gr2" draw:text-style-name="P3" draw:layer="layout" svg:x1="4.765cm" svg:y1="4.148cm" svg:x2="7.34cm" svg:y2="4.148cm">
          <text:p/>
        </draw:line>
        <draw:custom-shape draw:style-name="gr1" draw:text-style-name="P2" draw:layer="layout" svg:width="5.435cm" svg:height="2.896cm" svg:x="7.33cm" svg:y="14.683cm">
          <text:p text:style-name="P1">Lam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16.148cm" svg:x2="15.339cm" svg:y2="16.148cm">
          <text:p/>
        </draw:line>
        <draw:line draw:style-name="gr2" draw:text-style-name="P3" draw:layer="layout" svg:x1="4.765cm" svg:y1="16.149cm" svg:x2="7.34cm" svg:y2="16.149cm">
          <text:p/>
        </draw:line>
        <draw:frame draw:style-name="gr3" draw:text-style-name="P4" draw:layer="layout" svg:width="3.254cm" svg:height="1.673cm" svg:x="15.454cm" svg:y="3.254cm">
          <draw:text-box>
            <text:p>Énergie</text:p>
            <text:p>électrique</text:p>
          </draw:text-box>
        </draw:frame>
        <draw:custom-shape draw:style-name="gr1" draw:text-style-name="P2" draw:layer="layout" svg:width="5.435cm" svg:height="2.896cm" svg:x="7.33cm" svg:y="8.184cm">
          <text:p text:style-name="P1">Radiateur</text:p>
          <text:p text:style-name="P1">électr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9.649cm" svg:x2="15.339cm" svg:y2="9.649cm">
          <text:p/>
        </draw:line>
        <draw:line draw:style-name="gr2" draw:text-style-name="P3" draw:layer="layout" svg:x1="4.765cm" svg:y1="9.65cm" svg:x2="7.34cm" svg:y2="9.65cm">
          <text:p/>
        </draw:line>
        <draw:frame draw:style-name="gr3" draw:text-style-name="P4" draw:layer="layout" svg:width="3.254cm" svg:height="1.673cm" svg:x="2.011cm" svg:y="8.796cm">
          <draw:text-box>
            <text:p>Énergie</text:p>
            <text:p>électrique</text:p>
          </draw:text-box>
        </draw:frame>
        <draw:custom-shape draw:style-name="gr4" draw:text-style-name="P2" draw:layer="layout" svg:width="3.97cm" svg:height="2.503cm" svg:x="1cm" svg:y="21.596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65cm" svg:y1="22.949cm" svg:x2="7.54cm" svg:y2="22.949cm">
          <text:p/>
        </draw:line>
        <draw:custom-shape draw:style-name="gr4" draw:text-style-name="P2" draw:layer="layout" svg:width="3.97cm" svg:height="2.503cm" svg:x="7.436cm" svg:y="21.631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66cm" svg:y1="22.949cm" svg:x2="14.041cm" svg:y2="22.949cm">
          <text:p/>
        </draw:line>
        <draw:custom-shape draw:style-name="gr4" draw:text-style-name="P2" draw:layer="layout" svg:width="3.97cm" svg:height="2.503cm" svg:x="13.937cm" svg:y="21.631cm">
          <text:p text:style-name="P1">alimen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2" draw:text-style-name="P3" draw:layer="layout" svg:x1="0cm" svg:y1="13.858cm" svg:x2="2.575cm" svg:y2="13.858cm">
          <text:p/>
        </draw:line>
        <draw:custom-shape draw:style-name="gr4" draw:text-style-name="P2" draw:layer="layout" svg:width="3.97cm" svg:height="2.503cm" svg:x="2.497cm" svg:y="12.434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7cm" svg:y1="13.752cm" svg:x2="9.102cm" svg:y2="13.752cm">
          <text:p/>
        </draw:line>
        <draw:custom-shape draw:style-name="gr4" draw:text-style-name="P2" draw:layer="layout" svg:width="3.97cm" svg:height="2.503cm" svg:x="8.998cm" svg:y="12.434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5.525cm" svg:y="12.391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9cm" svg:y1="13.744cm" svg:x2="15.565cm" svg:y2="13.744cm">
          <text:p/>
        </draw:line>
        <draw:custom-shape draw:style-name="gr4" draw:text-style-name="P2" draw:layer="layout" svg:width="3.97cm" svg:height="2.503cm" svg:x="21.961cm" svg:y="12.426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491cm" svg:y1="13.744cm" svg:x2="22.066cm" svg:y2="13.744cm">
          <text:p/>
        </draw:line>
        <draw:line draw:style-name="gr2" draw:text-style-name="P3" draw:layer="layout" svg:x1="25.992cm" svg:y1="13.745cm" svg:x2="28.567cm" svg:y2="13.745cm">
          <text:p/>
        </draw:line>
        <draw:frame draw:style-name="gr5" draw:text-style-name="P4" draw:layer="layout" svg:width="2.619cm" svg:height="0.962cm" svg:x="3.235cm" svg:y="15.266cm">
          <draw:text-box>
            <text:p text:style-name="P5">stocker</text:p>
          </draw:text-box>
        </draw:frame>
        <draw:frame draw:style-name="gr6" draw:text-style-name="P4" draw:layer="layout" svg:width="3.749cm" svg:height="0.962cm" svg:x="9.345cm" svg:y="15.16cm">
          <draw:text-box>
            <text:p>distribuer</text:p>
          </draw:text-box>
        </draw:frame>
        <draw:frame draw:style-name="gr7" draw:text-style-name="P4" draw:layer="layout" svg:width="2.936cm" svg:height="0.962cm" svg:x="16.66cm" svg:y="15.212cm">
          <draw:text-box>
            <text:p>convertir</text:p>
          </draw:text-box>
        </draw:frame>
        <draw:frame draw:style-name="gr8" draw:text-style-name="P4" draw:layer="layout" svg:width="4.985cm" svg:height="0.962cm" svg:x="22.061cm" svg:y="15.212cm">
          <draw:text-box>
            <text:p>transmettre</text:p>
          </draw:text-box>
        </draw:frame>
        <draw:frame draw:style-name="gr9" draw:text-style-name="P3" draw:layer="layout" svg:width="4.683cm" svg:height="4.683cm" svg:x="2.142cm" svg:y="7.249cm">
          <draw:image xlink:href="Pictures/10000001000001DA000001DAAE4DCF04.png" xlink:type="simple" xlink:show="embed" xlink:actuate="onLoad" draw:mime-type="image/png">
            <text:p/>
          </draw:image>
        </draw:frame>
        <draw:frame draw:style-name="gr10" draw:text-style-name="P3" draw:layer="layout" svg:width="5.079cm" svg:height="4.073cm" svg:x="15.185cm" svg:y="7.593cm">
          <draw:image xlink:href="Pictures/10000001000001DA0000016317D89016.png" xlink:type="simple" xlink:show="embed" xlink:actuate="onLoad" draw:mime-type="image/png">
            <text:p/>
          </draw:image>
        </draw:frame>
        <draw:frame draw:style-name="gr9" draw:text-style-name="P3" draw:layer="layout" svg:width="5.491cm" svg:height="2.699cm" svg:x="22.01cm" svg:y="4.894cm">
          <draw:image xlink:href="Pictures/100000010000019F000000CC26B70710.png" xlink:type="simple" xlink:show="embed" xlink:actuate="onLoad" draw:mime-type="image/png">
            <text:p/>
          </draw:image>
        </draw:frame>
        <draw:frame draw:style-name="gr11" draw:text-style-name="P3" draw:layer="layout" svg:width="4.921cm" svg:height="4.695cm" svg:x="22.011cm" svg:y="7.738cm">
          <draw:image xlink:href="Pictures/100000010000022F0000012DE783619C.png" xlink:type="simple" xlink:show="embed" xlink:actuate="onLoad" draw:mime-type="image/png">
            <text:p/>
          </draw:image>
        </draw:frame>
        <draw:frame draw:style-name="gr12" draw:text-style-name="P1" draw:layer="layout" svg:width="6.49cm" svg:height="3.923cm" svg:x="8.007cm" svg:y="7.849cm">
          <draw:image xlink:href="Pictures/10000001000001DA0000016333DADDBC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3" draw:text-style-name="P7" draw:layer="layout" svg:width="21.207cm" svg:height="6.747cm" svg:x="2.524cm" svg:y="3.705cm">
          <text:p text:style-name="P6"><text:span text:style-name="T1">Chaine </text:span><text:span text:style-name="T1">d’_____</text:span><text:span text:style-name="T1">______</text:span><text:span text:style-name="T1">______</text:span><text:span text:style-name="T1">__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9.546cm" svg:height="6.747cm" svg:x="1.896cm" svg:y="11.774cm">
          <text:p text:style-name="P6"><text:span text:style-name="T1">Chaine d’_______________________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68cm" svg:y1="13.726cm" svg:x2="4.843cm" svg:y2="13.726cm">
          <text:p/>
        </draw:line>
        <draw:custom-shape draw:style-name="gr4" draw:text-style-name="P2" draw:layer="layout" svg:width="3.97cm" svg:height="2.503cm" svg:x="4.765cm" svg:y="12.302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5cm" svg:y1="13.62cm" svg:x2="11.37cm" svg:y2="13.62cm">
          <text:p/>
        </draw:line>
        <draw:custom-shape draw:style-name="gr15" draw:text-style-name="P9" xml:id="id1" draw:id="id1" draw:layer="layout" svg:width="3.97cm" svg:height="2.503cm" svg:x="11.266cm" svg:y="12.302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97cm" svg:height="2.503cm" svg:x="17.793cm" svg:y="12.259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58cm" svg:y1="13.612cm" svg:x2="17.833cm" svg:y2="13.612cm">
          <text:p/>
        </draw:line>
        <draw:custom-shape draw:style-name="gr17" draw:text-style-name="P9" draw:layer="layout" svg:width="3.97cm" svg:height="2.503cm" svg:x="24.229cm" svg:y="12.294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759cm" svg:y1="13.612cm" svg:x2="24.334cm" svg:y2="13.612cm">
          <text:p/>
        </draw:line>
        <draw:line draw:style-name="gr2" draw:text-style-name="P3" draw:layer="layout" svg:x1="28.26cm" svg:y1="13.613cm" svg:x2="30.835cm" svg:y2="13.613cm">
          <text:p/>
        </draw:line>
        <draw:frame draw:style-name="gr5" draw:text-style-name="P4" draw:layer="layout" svg:width="2.619cm" svg:height="0.962cm" svg:x="5.195cm" svg:y="14.825cm">
          <draw:text-box>
            <text:p text:style-name="P5">stocker</text:p>
          </draw:text-box>
        </draw:frame>
        <draw:frame draw:style-name="gr6" draw:text-style-name="P4" draw:layer="layout" svg:width="3.749cm" svg:height="0.962cm" svg:x="12.011cm" svg:y="14.94cm">
          <draw:text-box>
            <text:p>distribuer</text:p>
          </draw:text-box>
        </draw:frame>
        <draw:frame draw:style-name="gr7" draw:text-style-name="P4" draw:layer="layout" svg:width="2.936cm" svg:height="0.962cm" svg:x="18.399cm" svg:y="15.079cm">
          <draw:text-box>
            <text:p>convertir</text:p>
          </draw:text-box>
        </draw:frame>
        <draw:frame draw:style-name="gr8" draw:text-style-name="P4" draw:layer="layout" svg:width="4.985cm" svg:height="0.962cm" svg:x="24.373cm" svg:y="14.77cm">
          <draw:text-box>
            <text:p>transmettre</text:p>
          </draw:text-box>
        </draw:frame>
        <draw:custom-shape draw:style-name="gr4" draw:text-style-name="P2" draw:layer="layout" svg:width="3.97cm" svg:height="2.503cm" svg:x="5.397cm" svg:y="5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1.924cm" svg:y="4.98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89cm" svg:y1="6.335cm" svg:x2="11.964cm" svg:y2="6.335cm">
          <text:p/>
        </draw:line>
        <draw:custom-shape draw:style-name="gr4" draw:text-style-name="P2" xml:id="id2" draw:id="id2" draw:layer="layout" svg:width="3.97cm" svg:height="2.503cm" svg:x="18.36cm" svg:y="5.01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9cm" svg:y1="6.335cm" svg:x2="18.465cm" svg:y2="6.335cm">
          <text:p/>
        </draw:line>
        <draw:line draw:style-name="gr2" draw:text-style-name="P3" draw:layer="layout" svg:x1="2.791cm" svg:y1="6.336cm" svg:x2="5.366cm" svg:y2="6.336cm">
          <text:p/>
        </draw:line>
        <draw:frame draw:style-name="gr18" draw:text-style-name="P10" draw:layer="layout" svg:width="3.11cm" svg:height="0.963cm" svg:x="5.986cm" svg:y="7.721cm">
          <draw:text-box>
            <text:p>acquérir</text:p>
          </draw:text-box>
        </draw:frame>
        <draw:frame draw:style-name="gr18" draw:text-style-name="P10" draw:layer="layout" svg:width="2.936cm" svg:height="0.963cm" svg:x="12.511cm" svg:y="7.633cm">
          <draw:text-box>
            <text:p>traiter</text:p>
          </draw:text-box>
        </draw:frame>
        <draw:frame draw:style-name="gr19" draw:text-style-name="P10" draw:layer="layout" svg:width="4.942cm" svg:height="1.673cm" svg:x="18.518cm" svg:y="7.633cm">
          <draw:text-box>
            <text:p>communiquer</text:p>
          </draw:text-box>
        </draw:frame>
        <draw:connector draw:style-name="gr20" draw:text-style-name="P1" draw:layer="layout" svg:x1="13.251cm" svg:y1="12.302cm" svg:x2="22.33cm" svg:y2="6.268cm" draw:start-shape="id1" draw:start-glue-point="0" draw:end-shape="id2" draw:end-glue-point="1" svg:d="M13251 12302v-2392h9580v-3642h-501" svg:viewBox="0 0 9581 6035">
          <text:p/>
        </draw:connector>
        <draw:line draw:style-name="gr21" draw:text-style-name="P3" draw:layer="layout" svg:x1="22.307cm" svg:y1="5.699cm" svg:x2="25.563cm" svg:y2="5.699cm">
          <text:p/>
        </draw:line>
        <draw:frame draw:style-name="gr22" draw:text-style-name="P4" draw:layer="layout" svg:width="2.686cm" svg:height="0.962cm" svg:x="25.767cm" svg:y="5.373cm">
          <draw:text-box>
            <text:p>Humain</text:p>
          </draw:text-box>
        </draw:frame>
      </draw:page>
      <draw:page draw:name="page4" draw:style-name="dp1" draw:master-page-name="Standard">
        <draw:custom-shape draw:style-name="gr4" draw:text-style-name="P2" draw:layer="layout" svg:width="3.97cm" svg:height="2.503cm" svg:x="3.173cm" svg:y="12.038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9" draw:text-style-name="P3" draw:layer="layout" svg:width="9.313cm" svg:height="10.195cm" svg:x="9.366cm" svg:y="0.924cm">
          <draw:image xlink:href="Pictures/10000001000002F900000341AC376141.png" xlink:type="simple" xlink:show="embed" xlink:actuate="onLoad" draw:mime-type="image/png">
            <text:p/>
          </draw:image>
        </draw:frame>
        <draw:line draw:style-name="gr23" draw:text-style-name="P3" draw:layer="layout" svg:x1="15.187cm" svg:y1="2.857cm" svg:x2="7.408cm" svg:y2="2.857cm">
          <text:p/>
        </draw:line>
        <draw:line draw:style-name="gr23" draw:text-style-name="P3" draw:layer="layout" svg:x1="23.088cm" svg:y1="3.157cm" svg:x2="15.309cm" svg:y2="3.157cm">
          <text:p/>
        </draw:line>
        <draw:line draw:style-name="gr23" draw:text-style-name="P3" draw:layer="layout" svg:x1="13.489cm" svg:y1="6.057cm" svg:x2="11.218cm" svg:y2="4.709cm">
          <text:p/>
        </draw:line>
        <draw:line draw:style-name="gr23" draw:text-style-name="P3" draw:layer="layout" svg:x1="11.43cm" svg:y1="6.614cm" svg:x2="8.202cm" svg:y2="6.667cm">
          <text:p/>
        </draw:line>
        <draw:line draw:style-name="gr23" draw:text-style-name="P3" draw:layer="layout" svg:x1="11.006cm" svg:y1="7.884cm" svg:x2="8.102cm" svg:y2="7.902cm">
          <text:p/>
        </draw:line>
        <draw:line draw:style-name="gr23" draw:text-style-name="P3" draw:layer="layout" svg:x1="7.831cm" svg:y1="4.604cm" svg:x2="11.219cm" svg:y2="4.709cm">
          <text:p/>
        </draw:line>
        <draw:line draw:style-name="gr23" draw:text-style-name="P3" draw:layer="layout" svg:x1="13.19cm" svg:y1="7.358cm" svg:x2="11.483cm" svg:y2="6.562cm">
          <text:p/>
        </draw:line>
        <draw:frame draw:style-name="gr24" draw:text-style-name="P4" draw:layer="layout" svg:width="3.148cm" svg:height="0.962cm" svg:x="4.286cm" svg:y="2.38cm">
          <draw:text-box>
            <text:p>réflecteur</text:p>
          </draw:text-box>
        </draw:frame>
        <draw:frame draw:style-name="gr25" draw:text-style-name="P4" draw:layer="layout" svg:width="1.747cm" svg:height="0.962cm" svg:x="6.597cm" svg:y="4.286cm">
          <draw:text-box>
            <text:p>fil</text:p>
          </draw:text-box>
        </draw:frame>
        <draw:frame draw:style-name="gr6" draw:text-style-name="P4" draw:layer="layout" svg:width="3.749cm" svg:height="0.962cm" svg:x="4.544cm" svg:y="6.19cm">
          <draw:text-box>
            <text:p>interrupteur</text:p>
          </draw:text-box>
        </draw:frame>
        <draw:frame draw:style-name="gr26" draw:text-style-name="P4" draw:layer="layout" svg:width="3.921cm" svg:height="3.229cm" svg:x="5.868cm" svg:y="7.354cm">
          <draw:text-box>
            <text:p>prise</text:p>
          </draw:text-box>
        </draw:frame>
        <draw:frame draw:style-name="gr27" draw:text-style-name="P4" draw:layer="layout" svg:width="2.936cm" svg:height="0.962cm" svg:x="23.177cm" svg:y="2.857cm">
          <draw:text-box>
            <text:p>ampoule</text:p>
          </draw:text-box>
        </draw:frame>
        <draw:frame draw:style-name="gr18" draw:text-style-name="P10" draw:layer="layout" svg:width="3.11cm" svg:height="0.963cm" svg:x="3.604cm" svg:y="14.821cm">
          <draw:text-box>
            <text:p>alimenter</text:p>
          </draw:text-box>
        </draw:frame>
        <draw:frame draw:style-name="gr18" draw:text-style-name="P10" draw:layer="layout" svg:width="3.11cm" svg:height="0.963cm" svg:x="10.263cm" svg:y="14.734cm">
          <draw:text-box>
            <text:p>distribuer</text:p>
          </draw:text-box>
        </draw:frame>
        <draw:frame draw:style-name="gr18" draw:text-style-name="P10" draw:layer="layout" svg:width="2.936cm" svg:height="0.963cm" svg:x="16.788cm" svg:y="14.646cm">
          <draw:text-box>
            <text:p>convertir</text:p>
          </draw:text-box>
        </draw:frame>
        <draw:frame draw:style-name="gr18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5" draw:style-name="dp1" draw:master-page-name="Standard">
        <draw:frame draw:style-name="gr28" draw:text-style-name="P1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8" draw:text-style-name="P10" draw:layer="layout" svg:width="3.11cm" svg:height="0.963cm" svg:x="3.604cm" svg:y="14.821cm">
          <draw:text-box>
            <text:p>alimenter</text:p>
          </draw:text-box>
        </draw:frame>
        <draw:frame draw:style-name="gr18" draw:text-style-name="P10" draw:layer="layout" svg:width="3.11cm" svg:height="0.963cm" svg:x="10.263cm" svg:y="14.734cm">
          <draw:text-box>
            <text:p>distribuer</text:p>
          </draw:text-box>
        </draw:frame>
        <draw:frame draw:style-name="gr18" draw:text-style-name="P10" draw:layer="layout" svg:width="2.936cm" svg:height="0.963cm" svg:x="16.788cm" svg:y="14.646cm">
          <draw:text-box>
            <text:p>convertir</text:p>
          </draw:text-box>
        </draw:frame>
        <draw:frame draw:style-name="gr18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6" draw:style-name="dp1" draw:master-page-name="Standard">
        <draw:frame draw:style-name="gr28" draw:text-style-name="P1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8" draw:text-style-name="P12" draw:layer="layout" svg:width="3.11cm" svg:height="0.963cm" svg:x="3.604cm" svg:y="14.821cm">
          <draw:text-box>
            <text:p text:style-name="P11">alimenter</text:p>
          </draw:text-box>
        </draw:frame>
        <draw:frame draw:style-name="gr18" draw:text-style-name="P12" draw:layer="layout" svg:width="3.11cm" svg:height="0.963cm" svg:x="10.263cm" svg:y="14.734cm">
          <draw:text-box>
            <text:p text:style-name="P11">distribuer</text:p>
          </draw:text-box>
        </draw:frame>
        <draw:frame draw:style-name="gr18" draw:text-style-name="P12" draw:layer="layout" svg:width="2.936cm" svg:height="0.963cm" svg:x="16.788cm" svg:y="14.646cm">
          <draw:text-box>
            <text:p text:style-name="P11">convertir</text:p>
          </draw:text-box>
        </draw:frame>
        <draw:frame draw:style-name="gr18" draw:text-style-name="P12" draw:layer="layout" svg:width="3.711cm" svg:height="0.963cm" svg:x="22.795cm" svg:y="14.646cm">
          <draw:text-box>
            <text:p text:style-name="P11">transmettre</text:p>
          </draw:text-box>
        </draw:frame>
      </draw:page>
      <draw:page draw:name="page7" draw:style-name="dp1" draw:master-page-name="Standard">
        <draw:frame draw:style-name="gr28" draw:text-style-name="P1" draw:layer="layout" svg:width="8.157cm" svg:height="7.328cm" svg:x="8.864cm" svg:y="4.094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7cm" svg:x2="9.778cm" svg:y2="13.357cm">
          <text:p/>
        </draw:line>
        <draw:custom-shape draw:style-name="gr4" draw:text-style-name="P2" draw:layer="layout" svg:width="3.97cm" svg:height="2.503cm" svg:x="9.674cm" svg:y="12.0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9cm" svg:x2="16.241cm" svg:y2="13.349cm">
          <text:p/>
        </draw:line>
        <draw:custom-shape draw:style-name="gr4" draw:text-style-name="P2" draw:layer="layout" svg:width="3.97cm" svg:height="2.503cm" svg:x="22.637cm" svg:y="12.03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9cm" svg:x2="22.742cm" svg:y2="13.349cm">
          <text:p/>
        </draw:line>
        <draw:line draw:style-name="gr2" draw:text-style-name="P3" draw:layer="layout" svg:x1="26.668cm" svg:y1="13.35cm" svg:x2="29.243cm" svg:y2="13.35cm">
          <text:p/>
        </draw:line>
        <draw:line draw:style-name="gr2" draw:text-style-name="P3" draw:layer="layout" svg:x1="0.569cm" svg:y1="13.351cm" svg:x2="3.144cm" svg:y2="13.351cm">
          <text:p/>
        </draw:line>
        <draw:frame draw:style-name="gr18" draw:text-style-name="P10" draw:layer="layout" svg:width="3.11cm" svg:height="0.963cm" svg:x="3.604cm" svg:y="14.822cm">
          <draw:text-box>
            <text:p>alimenter</text:p>
          </draw:text-box>
        </draw:frame>
        <draw:frame draw:style-name="gr18" draw:text-style-name="P10" draw:layer="layout" svg:width="3.11cm" svg:height="0.963cm" svg:x="10.263cm" svg:y="14.735cm">
          <draw:text-box>
            <text:p>distribuer</text:p>
          </draw:text-box>
        </draw:frame>
        <draw:frame draw:style-name="gr18" draw:text-style-name="P10" draw:layer="layout" svg:width="2.936cm" svg:height="0.963cm" svg:x="16.788cm" svg:y="14.647cm">
          <draw:text-box>
            <text:p>convertir</text:p>
          </draw:text-box>
        </draw:frame>
        <draw:frame draw:style-name="gr18" draw:text-style-name="P10" draw:layer="layout" svg:width="3.711cm" svg:height="0.963cm" svg:x="22.795cm" svg:y="14.647cm">
          <draw:text-box>
            <text:p>transmettre</text:p>
          </draw:text-box>
        </draw:frame>
      </draw:page>
      <draw:page draw:name="page8" draw:style-name="dp1" draw:master-page-name="Standard">
        <draw:frame draw:style-name="gr29" draw:text-style-name="P1" draw:layer="layout" svg:width="19.102cm" svg:height="14.816cm" svg:x="5.591cm" svg:y="2.484cm">
          <draw:image xlink:href="Pictures/10000000000002D20000023089E195D1.png" xlink:type="simple" xlink:show="embed" xlink:actuate="onLoad" draw:mime-type="image/png">
            <text:p/>
          </draw:image>
        </draw:frame>
        <draw:line draw:style-name="gr30" draw:text-style-name="P3" draw:layer="layout" svg:x1="23.3cm" svg:y1="10.369cm" svg:x2="16.47cm" svg:y2="10.369cm">
          <text:p/>
        </draw:line>
        <draw:frame draw:style-name="gr22" draw:text-style-name="P13" draw:layer="layout" svg:width="0.794cm" svg:height="0.839cm" svg:x="23.333cm" svg:y="9.955cm">
          <draw:text-box>
            <text:p><text:span text:style-name="T2">4</text:span></text:p>
          </draw:text-box>
        </draw:frame>
        <draw:frame draw:style-name="gr31" draw:text-style-name="P14" draw:layer="layout" svg:width="0.314cm" svg:height="0.839cm" svg:x="23.466cm" svg:y="11.312cm">
          <draw:text-box>
            <text:p><text:span text:style-name="T2">5</text:span></text:p>
          </draw:text-box>
        </draw:frame>
        <draw:frame draw:style-name="gr31" draw:text-style-name="P14" draw:layer="layout" svg:width="0.314cm" svg:height="0.839cm" svg:x="23.477cm" svg:y="11.313cm">
          <draw:text-box>
            <text:p><text:span text:style-name="T2">5</text:span></text:p>
          </draw:text-box>
        </draw:frame>
        <draw:frame draw:style-name="gr31" draw:text-style-name="P14" draw:layer="layout" svg:width="0.314cm" svg:height="0.839cm" svg:x="23.72cm" svg:y="14.266cm">
          <draw:text-box>
            <text:p><text:span text:style-name="T2">6</text:span></text:p>
          </draw:text-box>
        </draw:frame>
        <draw:frame draw:style-name="gr31" draw:text-style-name="P14" draw:layer="layout" svg:width="0.314cm" svg:height="0.839cm" svg:x="23.789cm" svg:y="16.148cm">
          <draw:text-box>
            <text:p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7 20 13" svg:d="M0 20l10-13 10 13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20:53:28.487634874</meta:creation-date>
    <dc:date>2026-05-25T21:32:52.587745897</dc:date>
    <meta:editing-duration>PT2H50M51S</meta:editing-duration>
    <meta:editing-cycles>7</meta:editing-cycles>
    <meta:generator>LibreOffice/24.2.7.2$Linux_X86_64 LibreOffice_project/420$Build-2</meta:generator>
    <meta:document-statistic meta:object-count="136"/>
  </office:meta>
</office:document-meta>
</file>